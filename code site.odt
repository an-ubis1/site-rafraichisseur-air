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Arial" style:font-name-complex="Arial"/>
    </style:style>
    <style:style style:name="T3" style:parent-style-name="Policepardéfaut" style:family="text">
      <style:text-properties style:font-name="Arial" style:font-name-complex="Arial"/>
    </style:style>
    <style:style style:name="T4" style:parent-style-name="Policepardéfaut" style:family="text">
      <style:text-properties style:font-name="Segoe UI Emoji" style:font-name-complex="Segoe UI Emoji"/>
    </style:style>
    <style:style style:name="T5" style:parent-style-name="Policepardéfaut" style:family="text">
      <style:text-properties style:font-name="Segoe UI Emoji" style:font-name-complex="Segoe UI Emoji"/>
    </style:style>
    <style:style style:name="T6" style:parent-style-name="Policepardéfaut" style:family="text">
      <style:text-properties style:font-name="Segoe UI Symbol" style:font-name-complex="Segoe UI Symbol"/>
    </style:style>
    <style:style style:name="T7" style:parent-style-name="Policepardéfaut" style:family="text">
      <style:text-properties style:font-name="Aptos" style:font-name-complex="Aptos"/>
    </style:style>
    <style:style style:name="T8" style:parent-style-name="Policepardéfaut" style:family="text">
      <style:text-properties style:font-name="Segoe UI Emoji" style:font-name-complex="Segoe UI Emoji"/>
    </style:style>
    <style:style style:name="T9" style:parent-style-name="Policepardéfaut" style:family="text">
      <style:text-properties style:font-name="Segoe UI Emoji" style:font-name-complex="Segoe UI Emoji"/>
    </style:style>
    <style:style style:name="T10" style:parent-style-name="Policepardéfaut" style:family="text">
      <style:text-properties style:font-name="Segoe UI Emoji" style:font-name-complex="Segoe UI Emoji"/>
    </style:style>
    <style:style style:name="T11" style:parent-style-name="Policepardéfaut" style:family="text">
      <style:text-properties style:font-name="Segoe UI Emoji" style:font-name-complex="Segoe UI Emoji"/>
    </style:style>
    <style:style style:name="T12" style:parent-style-name="Policepardéfaut" style:family="text">
      <style:text-properties style:font-name="Segoe UI Emoji" style:font-name-complex="Segoe UI Emoji"/>
    </style:style>
    <style:style style:name="T13" style:parent-style-name="Policepardéfaut" style:family="text">
      <style:text-properties style:font-name="Segoe UI Emoji" style:font-name-complex="Segoe UI Emoji"/>
    </style:style>
    <style:style style:name="T14" style:parent-style-name="Policepardéfaut" style:family="text">
      <style:text-properties style:font-name="Segoe UI Emoji" style:font-name-complex="Segoe UI Emoji"/>
    </style:style>
    <style:style style:name="T15" style:parent-style-name="Policepardéfaut" style:family="text">
      <style:text-properties style:font-name="Segoe UI Emoji" style:font-name-complex="Segoe UI Emoji"/>
    </style:style>
    <style:style style:name="T16" style:parent-style-name="Policepardéfaut" style:family="text">
      <style:text-properties style:font-name="Segoe UI Emoji" style:font-name-complex="Segoe UI Emoji"/>
    </style:style>
    <style:style style:name="T17" style:parent-style-name="Policepardéfaut" style:family="text">
      <style:text-properties style:font-name="Aptos" style:font-name-complex="Aptos"/>
    </style:style>
    <style:style style:name="T18" style:parent-style-name="Policepardéfaut" style:family="text">
      <style:text-properties style:font-name="Segoe UI Emoji" style:font-name-complex="Segoe UI Emoji"/>
    </style:style>
    <style:style style:name="T19" style:parent-style-name="Policepardéfaut" style:family="text">
      <style:text-properties style:font-name="Segoe UI Emoji" style:font-name-complex="Segoe UI Emoji"/>
    </style:style>
    <style:style style:name="T20" style:parent-style-name="Policepardéfaut" style:family="text">
      <style:text-properties style:font-name="Arial" style:font-name-complex="Arial"/>
    </style:style>
    <style:style style:name="T21" style:parent-style-name="Policepardéfaut" style:family="text">
      <style:text-properties style:font-name="Arial" style:font-name-complex="Arial"/>
    </style:style>
    <style:style style:name="T22" style:parent-style-name="Policepardéfaut" style:family="text">
      <style:text-properties style:font-name="Segoe UI Emoji" style:font-name-complex="Segoe UI Emoji"/>
    </style:style>
    <style:style style:name="T23" style:parent-style-name="Policepardéfaut" style:family="text">
      <style:text-properties style:font-name="Segoe UI Emoji" style:font-name-complex="Segoe UI Emoji"/>
    </style:style>
    <style:style style:name="T24" style:parent-style-name="Policepardéfaut" style:family="text">
      <style:text-properties style:font-name="Segoe UI Emoji" style:font-name-complex="Segoe UI Emoji"/>
    </style:style>
    <style:style style:name="T25" style:parent-style-name="Policepardéfaut" style:family="text">
      <style:text-properties style:font-name="Segoe UI Emoji" style:font-name-complex="Segoe UI Emoji"/>
    </style:style>
    <style:style style:name="T26" style:parent-style-name="Policepardéfaut" style:family="text">
      <style:text-properties style:font-name="Segoe UI Symbol" style:font-name-complex="Segoe UI Symbol"/>
    </style:style>
    <style:style style:name="T27" style:parent-style-name="Policepardéfaut" style:family="text">
      <style:text-properties style:font-name="Aptos" style:font-name-complex="Aptos"/>
    </style:style>
    <style:style style:name="T28" style:parent-style-name="Policepardéfaut" style:family="text">
      <style:text-properties style:font-name="Aptos" style:font-name-complex="Aptos"/>
    </style:style>
    <style:style style:name="T29" style:parent-style-name="Policepardéfaut" style:family="text">
      <style:text-properties style:font-name="Aptos" style:font-name-complex="Aptos"/>
    </style:style>
    <style:style style:name="T30" style:parent-style-name="Policepardéfaut" style:family="text">
      <style:text-properties style:font-name="Segoe UI Emoji" style:font-name-complex="Segoe UI Emoji"/>
    </style:style>
    <style:style style:name="T31" style:parent-style-name="Policepardéfaut" style:family="text">
      <style:text-properties style:font-name="Segoe UI Emoji" style:font-name-complex="Segoe UI Emoji"/>
    </style:style>
    <style:style style:name="T32" style:parent-style-name="Policepardéfaut" style:family="text">
      <style:text-properties style:font-name="Segoe UI Emoji" style:font-name-complex="Segoe UI Emoji"/>
    </style:style>
    <style:style style:name="T33" style:parent-style-name="Policepardéfaut" style:family="text">
      <style:text-properties style:font-name="Arial" style:font-name-complex="Arial"/>
    </style:style>
    <style:style style:name="T34" style:parent-style-name="Policepardéfaut" style:family="text">
      <style:text-properties style:font-name="Arial" style:font-name-complex="Arial"/>
    </style:style>
    <style:style style:name="T35" style:parent-style-name="Policepardéfaut" style:family="text">
      <style:text-properties style:font-name="Segoe UI Emoji" style:font-name-complex="Segoe UI Emoji"/>
    </style:style>
    <style:style style:name="T36" style:parent-style-name="Policepardéfaut" style:family="text">
      <style:text-properties style:font-name="Segoe UI Emoji" style:font-name-complex="Segoe UI Emoji"/>
    </style:style>
    <style:style style:name="T37" style:parent-style-name="Policepardéfaut" style:family="text">
      <style:text-properties style:font-name="Segoe UI Emoji" style:font-name-complex="Segoe UI Emoji"/>
    </style:style>
    <style:style style:name="T38" style:parent-style-name="Policepardéfaut" style:family="text">
      <style:text-properties style:font-name="Segoe UI Emoji" style:font-name-complex="Segoe UI Emoji"/>
    </style:style>
    <style:style style:name="T39" style:parent-style-name="Policepardéfaut" style:family="text">
      <style:text-properties style:font-name="Segoe UI Symbol" style:font-name-complex="Segoe UI Symbol"/>
    </style:style>
    <style:style style:name="T40" style:parent-style-name="Policepardéfaut" style:family="text">
      <style:text-properties style:font-name="Aptos" style:font-name-complex="Aptos"/>
    </style:style>
    <style:style style:name="T41" style:parent-style-name="Policepardéfaut" style:family="text">
      <style:text-properties style:font-name="Aptos" style:font-name-complex="Aptos"/>
    </style:style>
    <style:style style:name="T42" style:parent-style-name="Policepardéfaut" style:family="text">
      <style:text-properties style:font-name="Aptos" style:font-name-complex="Aptos"/>
    </style:style>
    <style:style style:name="T43" style:parent-style-name="Policepardéfaut" style:family="text">
      <style:text-properties style:font-name="Segoe UI Emoji" style:font-name-complex="Segoe UI Emoji"/>
    </style:style>
    <style:style style:name="T44" style:parent-style-name="Policepardéfaut" style:family="text">
      <style:text-properties style:font-name="Segoe UI Emoji" style:font-name-complex="Segoe UI Emoji"/>
    </style:style>
    <style:style style:name="T45" style:parent-style-name="Policepardéfaut" style:family="text">
      <style:text-properties style:font-name="Segoe UI Emoji" style:font-name-complex="Segoe UI Emoji"/>
    </style:style>
    <style:style style:name="T46" style:parent-style-name="Policepardéfaut" style:family="text">
      <style:text-properties style:font-name="Arial" style:font-name-complex="Arial"/>
    </style:style>
    <style:style style:name="T47" style:parent-style-name="Policepardéfaut" style:family="text">
      <style:text-properties style:font-name="Arial" style:font-name-complex="Arial"/>
    </style:style>
    <style:style style:name="T48" style:parent-style-name="Policepardéfaut" style:family="text">
      <style:text-properties style:font-name="Segoe UI Emoji" style:font-name-complex="Segoe UI Emoji"/>
    </style:style>
    <style:style style:name="T49" style:parent-style-name="Policepardéfaut" style:family="text">
      <style:text-properties style:font-name="Segoe UI Emoji" style:font-name-complex="Segoe UI Emoji"/>
    </style:style>
    <style:style style:name="T50" style:parent-style-name="Policepardéfaut" style:family="text">
      <style:text-properties style:font-name="Segoe UI Emoji" style:font-name-complex="Segoe UI Emoji"/>
    </style:style>
    <style:style style:name="T51" style:parent-style-name="Policepardéfaut" style:family="text">
      <style:text-properties style:font-name="Arial" style:font-name-complex="Arial"/>
    </style:style>
    <style:style style:name="T52" style:parent-style-name="Policepardéfaut" style:family="text">
      <style:text-properties style:font-name="Arial" style:font-name-complex="Arial"/>
    </style:style>
    <style:style style:name="T53" style:parent-style-name="Policepardéfaut" style:family="text">
      <style:text-properties style:font-name="Segoe UI Emoji" style:font-name-complex="Segoe UI Emoji"/>
    </style:style>
    <style:style style:name="T54" style:parent-style-name="Policepardéfaut" style:family="text">
      <style:text-properties style:font-name="Segoe UI Symbol" style:font-name-complex="Segoe UI Symbol"/>
    </style:style>
    <style:style style:name="T55" style:parent-style-name="Policepardéfaut" style:family="text">
      <style:text-properties style:font-name="Segoe UI Emoji" style:font-name-complex="Segoe UI Emoji"/>
    </style:style>
    <style:style style:name="T56" style:parent-style-name="Policepardéfaut" style:family="text">
      <style:text-properties style:font-name="Segoe UI Emoji" style:font-name-complex="Segoe UI Emoji"/>
    </style:style>
    <style:style style:name="T57" style:parent-style-name="Policepardéfaut" style:family="text">
      <style:text-properties style:font-name="Segoe UI Emoji" style:font-name-complex="Segoe UI Emoji"/>
    </style:style>
    <style:style style:name="T58" style:parent-style-name="Policepardéfaut" style:family="text">
      <style:text-properties style:font-name="Segoe UI Emoji" style:font-name-complex="Segoe UI Emoji"/>
    </style:style>
    <style:style style:name="T59" style:parent-style-name="Policepardéfaut" style:family="text">
      <style:text-properties style:font-name="Arial" style:font-name-complex="Arial"/>
    </style:style>
    <style:style style:name="T60" style:parent-style-name="Policepardéfaut" style:family="text">
      <style:text-properties style:font-name="Arial" style:font-name-complex="Arial"/>
    </style:style>
    <style:style style:name="T61" style:parent-style-name="Policepardéfaut" style:family="text">
      <style:text-properties style:font-name="Segoe UI Emoji" style:font-name-complex="Segoe UI Emoji"/>
    </style:style>
    <style:style style:name="T62" style:parent-style-name="Policepardéfaut" style:family="text">
      <style:text-properties style:font-name="Segoe UI Emoji" style:font-name-complex="Segoe UI Emoji"/>
    </style:style>
    <style:style style:name="T63" style:parent-style-name="Policepardéfaut" style:family="text">
      <style:text-properties style:font-name="Segoe UI Emoji" style:font-name-complex="Segoe UI Emoji"/>
    </style:style>
    <style:style style:name="T64" style:parent-style-name="Policepardéfaut" style:family="text">
      <style:text-properties style:font-name="Segoe UI Emoji" style:font-name-complex="Segoe UI Emoji"/>
    </style:style>
    <style:style style:name="T65" style:parent-style-name="Policepardéfaut" style:family="text">
      <style:text-properties style:font-name="Segoe UI Emoji" style:font-name-complex="Segoe UI Emoji"/>
    </style:style>
  </office:automatic-styles>
  <office:body>
    <office:text text:use-soft-page-breaks="true">
      <text:p text:style-name="P1">&lt;!DOCTYPE html&gt;</text:p>
      <text:p text:style-name="Normal">&lt;html lang="fr"&gt;</text:p>
      <text:p text:style-name="Normal">&lt;head&gt;</text:p>
      <text:p text:style-name="Normal">&lt;meta charset="UTF-8"&gt;</text:p>
      <text:p text:style-name="Normal">&lt;meta name="viewport" content="width=device-width, initial-scale=1.0"&gt;</text:p>
      <text:p text:style-name="Normal">&lt;title&gt;AËRA — Rafraîchisseur d'air&lt;/title&gt;</text:p>
      <text:p text:style-name="Normal">&lt;link href="https://fonts.googleapis.com/css2?family=Syne:wght@400;600;700;800&amp;family=DM+Sans:ital,wght@0,300;0,400;0,500;1,300&amp;display=swap" rel="stylesheet"&gt;</text:p>
      <text:p text:style-name="Normal">&lt;style&gt;</text:p>
      <text:p text:style-name="Normal">*,*::before,*::after{margin:0;padding:0;box-sizing:border-box;}</text:p>
      <text:p text:style-name="Normal">:root{--noir:#04040a;--blanc:#f5f3ef;--cyan:#4FC8D4;--lavande:#9B7FFF;--rose:#FF7B9C;--or:#FFD166;--gris:#0d0d18;}</text:p>
      <text:p text:style-name="Normal">html{scroll-behavior:smooth;}</text:p>
      <text:p text:style-name="Normal">body{background:var(--noir);color:var(--blanc);font-family:'DM Sans',sans-serif;overflow-x:hidden;cursor:none;}</text:p>
      <text:p text:style-name="Normal">#cursor{position:fixed;width:12px;height:12px;background:var(--cyan);border-radius:50%;pointer-events:none;z-index:9999;transition:transform .15s,background .3s;mix-blend-mode:screen;transform:translate(-50%,-50%);}</text:p>
      <text:p text:style-name="Normal">#ctrail{position:fixed;width:40px;height:40px;border:1px solid rgba(79,200,212,.35);border-radius:50%;pointer-events:none;z-index:9998;mix-blend-mode:screen;transform:translate(-50%,-50%);transition:transform .4s;}</text:p>
      <text:p text:style-name="Normal">nav{position:fixed;top:0;left:0;right:0;z-index:100;display:flex;justify-content:space-between;align-items:center;padding:1.4rem 4rem;background:rgba(4,4,10,.88);backdrop-filter:blur(24px);border-bottom:1px solid rgba(255,255,255,.05);}</text:p>
      <text:p text:style-name="Normal">.logo{font-family:'Syne',sans-serif;font-size:1.4rem;font-weight:800;letter-spacing:.3em;}</text:p>
      <text:p text:style-name="Normal">.logo span{color:var(--cyan);}</text:p>
      <text:p text:style-name="Normal">nav ul{list-style:none;display:flex;gap:2.5rem;}</text:p>
      <text:p text:style-name="Normal">nav a{color:rgba(245,243,239,.5);text-decoration:none;font-size:.82rem;letter-spacing:.1em;text-transform:uppercase;transition:color .3s;cursor:none;}</text:p>
      <text:soft-page-break/>
      <text:p text:style-name="Normal">nav a:hover{color:var(--cyan);}</text:p>
      <text:p text:style-name="Normal">.nav-cart-btn{position:relative;background:var(--cyan);color:var(--noir);padding:.6rem 1.5rem;font-family:'DM Sans',sans-serif;font-size:.78rem;font-weight:500;letter-spacing:.12em;text-transform:uppercase;border:none;cursor:none;transition:all .3s;}</text:p>
      <text:p text:style-name="Normal">.nav-cart-btn:hover{background:var(--blanc);}</text:p>
      <text:p text:style-name="Normal">.cnt{position:absolute;top:-7px;right:-7px;background:var(--rose);color:#fff;font-size:.62rem;font-weight:700;width:17px;height:17px;border-radius:50%;display:flex;align-items:center;justify-content:center;}</text:p>
      <text:p text:style-name="Normal">.page{display:none;min-height:100vh;padding-top:80px;}</text:p>
      <text:p text:style-name="Normal">.page.active{display:block;}</text:p>
      <text:p text:style-name="Normal">/* HERO */</text:p>
      <text:p text:style-name="Normal">#hero{position:relative;height:calc(100vh - 80px);display:flex;align-items:center;overflow:hidden;}</text:p>
      <text:p text:style-name="Normal">#hcv{position:absolute;inset:0;width:100%;height:100%;}</text:p>
      <text:p text:style-name="Normal">.hero-left{position:relative;z-index:10;padding:0 5rem;max-width:62%;}</text:p>
      <text:p text:style-name="Normal">.eyebrow{font-size:.7rem;letter-spacing:.4em;text-transform:uppercase;color:var(--cyan);margin-bottom:1.5rem;opacity:0;animation:fu 1s .3s forwards;}</text:p>
      <text:p text:style-name="Normal">.hero-title{font-family:'Syne',sans-serif;font-size:clamp(4rem,9vw,9.5rem);font-weight:800;line-height:.9;letter-spacing:-.02em;opacity:0;animation:fu 1.2s .1s forwards;}</text:p>
      <text:p text:style-name="Normal">.hero-title .ac{color:var(--cyan);}</text:p>
      <text:p text:style-name="Normal">.hero-title .gh{color:transparent;-webkit-text-stroke:1px rgba(245,243,239,.22);font-style:italic;}</text:p>
      <text:p text:style-name="Normal">.hero-sub{margin-top:2rem;font-size:.97rem;font-weight:300;color:rgba(245,243,239,.48);max-width:420px;line-height:1.75;opacity:0;animation:fu 1s .5s forwards;}</text:p>
      <text:p text:style-name="Normal">.hero-actions{display:flex;gap:1.2rem;margin-top:3rem;align-items:center;opacity:0;animation:fu 1s .7s forwards;}</text:p>
      <text:p text:style-name="Normal">.btn-main{padding:1rem 2.6rem;background:var(--cyan);color:var(--noir);font-family:'DM Sans',sans-serif;font-size:.85rem;font-weight:500;letter-spacing:.15em;text-transform:uppercase;border:none;cursor:none;transition:all .3s;}</text:p>
      <text:p text:style-name="Normal">.btn-main:hover{background:var(--blanc);transform:translateY(-2px);}</text:p>
      <text:soft-page-break/>
      <text:p text:style-name="Normal">.btn-ghost{padding:1rem 2.2rem;background:transparent;color:var(--blanc);font-family:'DM Sans',sans-serif;font-size:.85rem;letter-spacing:.12em;text-transform:uppercase;border:1px solid rgba(245,243,239,.18);cursor:none;transition:all .3s;}</text:p>
      <text:p text:style-name="Normal">.btn-ghost:hover{border-color:rgba(245,243,239,.45);}</text:p>
      <text:p text:style-name="Normal">.badge-ship{display:flex;align-items:center;gap:.8rem;padding:.8rem 1.5rem;border:1px solid rgba(79,200,212,.2);background:rgba(79,200,212,.05);font-size:.78rem;color:var(--cyan);}</text:p>
      <text:p text:style-name="Normal">.badge-ship strong{font-size:1.4rem;font-family:'Syne',sans-serif;}</text:p>
      <text:p text:style-name="Normal">/* STATS */</text:p>
      <text:p text:style-name="Normal">.stats-bar{display:grid;grid-template-columns:repeat(3,1fr);border-top:1px solid rgba(255,255,255,.05);border-bottom:1px solid rgba(255,255,255,.05);}</text:p>
      <text:p text:style-name="Normal">.stat-item{padding:2.5rem 3rem;border-right:1px solid rgba(255,255,255,.05);text-align:center;}</text:p>
      <text:p text:style-name="Normal">.stat-item:last-child{border-right:none;}</text:p>
      <text:p text:style-name="Normal">.stn{font-family:'Syne',sans-serif;font-size:2.8rem;font-weight:800;color:var(--cyan);line-height:1;}</text:p>
      <text:p text:style-name="Normal">.stl{font-size:.72rem;color:rgba(245,243,239,.38);letter-spacing:.12em;text-transform:uppercase;margin-top:.4rem;}</text:p>
      <text:p text:style-name="Normal">/* SECTION */</text:p>
      <text:p text:style-name="Normal">.sp{padding:8rem 5rem;}</text:p>
      <text:p text:style-name="Normal">.slabel{font-size:.68rem;letter-spacing:.4em;text-transform:uppercase;color:var(--cyan);margin-bottom:1.2rem;}</text:p>
      <text:p text:style-name="Normal">.stitle{font-family:'Syne',sans-serif;font-size:clamp(2rem,5vw,4.5rem);font-weight:700;line-height:1.05;margin-bottom:4rem;}</text:p>
      <text:p text:style-name="Normal">/* GRID PRODUITS */</text:p>
      <text:p text:style-name="Normal">.pgrid{display:grid;grid-template-columns:1.4fr 1fr;gap:2rem;}</text:p>
      <text:p text:style-name="Normal">.pcm{background:var(--gris);border:1px solid rgba(255,255,255,.06);padding:3rem;position:relative;overflow:hidden;cursor:none;transition:border-color .4s;}</text:p>
      <text:p text:style-name="Normal">.pcm:hover{border-color:rgba(79,200,212,.3);}</text:p>
      <text:p text:style-name="Normal">.pcs{display:flex;flex-direction:column;gap:2rem;}</text:p>
      <text:soft-page-break/>
      <text:p text:style-name="Normal">.pcsm{background:var(--gris);border:1px solid rgba(255,255,255,.06);padding:2rem;position:relative;overflow:hidden;cursor:none;flex:1;transition:border-color .4s;}</text:p>
      <text:p text:style-name="Normal">.pcsm:hover{border-color:rgba(155,127,255,.3);}</text:p>
      <text:p text:style-name="Normal">.cbdg{display:inline-flex;align-items:center;gap:.5rem;font-size:.65rem;letter-spacing:.2em;text-transform:uppercase;padding:.35rem .8rem;margin-bottom:1.5rem;}</text:p>
      <text:p text:style-name="Normal">.bn{background:rgba(255,209,102,.1);color:var(--or);border:1px solid rgba(255,209,102,.25);}</text:p>
      <text:p text:style-name="Normal">.bla{background:rgba(79,200,212,.1);color:var(--cyan);border:1px solid rgba(79,200,212,.25);}</text:p>
      <text:p text:style-name="Normal">.bbu{background:rgba(155,127,255,.1);color:var(--lavande);border:1px solid rgba(155,127,255,.25);}</text:p>
      <text:p text:style-name="Normal">.cpn{font-family:'Syne',sans-serif;font-size:1.6rem;font-weight:700;margin-bottom:.8rem;line-height:1.2;}</text:p>
      <text:p text:style-name="Normal">.cpd{font-size:.88rem;color:rgba(245,243,239,.42);line-height:1.75;margin-bottom:2rem;}</text:p>
      <text:p text:style-name="Normal">.cpr{display:flex;align-items:baseline;gap:1rem;margin-bottom:1.5rem;}</text:p>
      <text:p text:style-name="Normal">.pm{font-family:'Syne',sans-serif;font-size:2.2rem;font-weight:800;}</text:p>
      <text:p text:style-name="Normal">.po{font-size:.9rem;color:rgba(245,243,239,.28);text-decoration:line-through;}</text:p>
      <text:p text:style-name="Normal">.ps{font-size:.72rem;background:rgba(79,200,212,.1);color:var(--cyan);padding:.2rem .6rem;}</text:p>
      <text:p text:style-name="Normal">.btn-add{width:100%;padding:1rem;background:var(--cyan);color:var(--noir);font-family:'DM Sans',sans-serif;font-size:.82rem;font-weight:500;letter-spacing:.15em;text-transform:uppercase;border:none;cursor:none;transition:all .3s;}</text:p>
      <text:p text:style-name="Normal">.btn-add:hover{background:var(--blanc);}</text:p>
      <text:p text:style-name="Normal">.btn-ao{width:100%;padding:.9rem;background:transparent;color:var(--lavande);font-family:'DM Sans',sans-serif;font-size:.82rem;letter-spacing:.12em;text-transform:uppercase;border:1px solid rgba(155,127,255,.3);cursor:none;transition:all .3s;}</text:p>
      <text:p text:style-name="Normal">.btn-ao:hover{background:rgba(155,127,255,.07);}</text:p>
      <text:p text:style-name="Normal">.cvmain{height:200px;display:flex;align-items:center;justify-content:center;position:relative;margin-bottom:2rem;}</text:p>
      <text:soft-page-break/>
      <text:p text:style-name="Normal">.cvsm{height:110px;display:flex;align-items:center;justify-content:center;position:relative;margin-bottom:1.5rem;}</text:p>
      <text:p text:style-name="Normal">.icon-main{font-size:5rem;animation:ifloat 4s ease-in-out infinite;filter:drop-shadow(0 0 40px rgba(79,200,212,.45));}</text:p>
      <text:p text:style-name="Normal">.icon-sm{font-size:3.5rem;animation:ifloat 5s ease-in-out infinite;filter:drop-shadow(0 0 30px rgba(155,127,255,.45));}</text:p>
      <text:p text:style-name="Normal">@keyframes ifloat{0%,100%{transform:translateY(0);}50%{transform:translateY(-12px);}}</text:p>
      <text:p text:style-name="Normal">.stars{color:var(--or);font-size:.85rem;letter-spacing:.05em;}</text:p>
      <text:p text:style-name="Normal">.srow{display:flex;align-items:center;gap:.5rem;margin-bottom:1rem;}</text:p>
      <text:p text:style-name="Normal">.sc{font-size:.78rem;color:rgba(245,243,239,.38);}</text:p>
      <text:p text:style-name="Normal">.cfl{list-style:none;display:flex;flex-direction:column;gap:.6rem;margin-bottom:2rem;}</text:p>
      <text:p text:style-name="Normal">.cfl li{font-size:.82rem;color:rgba(245,243,239,.52);display:flex;align-items:center;gap:.6rem;}</text:p>
      <text:p text:style-name="Normal">.fd{width:5px;height:5px;border-radius:50%;background:var(--cyan);flex-shrink:0;}</text:p>
      <text:p text:style-name="Normal">.cglow{position:absolute;border-radius:50%;filter:blur(80px);pointer-events:none;opacity:.06;}</text:p>
      <text:p text:style-name="Normal">/* FEATURES */</text:p>
      <text:p text:style-name="Normal">.fgrid{display:grid;grid-template-columns:repeat(3,1fr);gap:2rem;}</text:p>
      <text:p text:style-name="Normal">.fcard{padding:2.5rem;border:1px solid rgba(255,255,255,.06);transition:border-color .4s;}</text:p>
      <text:p text:style-name="Normal">.fcard:hover{border-color:rgba(79,200,212,.2);}</text:p>
      <text:p text:style-name="Normal">.fcard h3{font-family:'Syne',sans-serif;font-size:1.1rem;font-weight:700;margin-bottom:.8rem;margin-top:1.5rem;}</text:p>
      <text:p text:style-name="Normal">.fcard p{font-size:.85rem;color:rgba(245,243,239,.42);line-height:1.75;}</text:p>
      <text:p text:style-name="Normal">/* PRODUCT DETAIL */</text:p>
      <text:p text:style-name="Normal">.pdl{display:grid;grid-template-columns:1fr 1fr;gap:5rem;padding:4rem 5rem 8rem;}</text:p>
      <text:p text:style-name="Normal">.pvb{position:relative;aspect-ratio:1;background:var(--gris);border:1px solid rgba(255,255,255,.06);display:flex;align-items:center;justify-content:center;overflow:hidden;}</text:p>
      <text:p text:style-name="Normal">.pvb canvas{position:absolute;inset:0;width:100%;height:100%;}</text:p>
      <text:soft-page-break/>
      <text:p text:style-name="Normal">.pbi{font-size:10rem;position:relative;z-index:5;animation:ifloat 4s ease-in-out infinite;filter:drop-shadow(0 0 60px rgba(79,200,212,.55));}</text:p>
      <text:p text:style-name="Normal">.pthmbs{display:flex;gap:1rem;margin-top:1rem;}</text:p>
      <text:p text:style-name="Normal">.thmb{width:70px;height:70px;background:var(--gris);border:1px solid rgba(255,255,255,.08);display:flex;align-items:center;justify-content:center;cursor:none;font-size:1.8rem;transition:border-color .3s;}</text:p>
      <text:p text:style-name="Normal">.thmb.active,.thmb:hover{border-color:var(--cyan);}</text:p>
      <text:p text:style-name="Normal">.bcrumb{font-size:.75rem;color:rgba(245,243,239,.28);margin-bottom:2rem;display:flex;gap:.5rem;align-items:center;}</text:p>
      <text:p text:style-name="Normal">.bcrumb span{cursor:none;transition:color .3s;}</text:p>
      <text:p text:style-name="Normal">.bcrumb span:hover{color:var(--cyan);}</text:p>
      <text:p text:style-name="Normal">.dtitle{font-family:'Syne',sans-serif;font-size:clamp(1.8rem,3.5vw,3rem);font-weight:700;line-height:1.1;margin-bottom:1.5rem;}</text:p>
      <text:p text:style-name="Normal">.dprice-block{padding:2rem;background:var(--gris);border:1px solid rgba(255,255,255,.06);margin:2rem 0;}</text:p>
      <text:p text:style-name="Normal">.dpb{font-family:'Syne',sans-serif;font-size:3rem;font-weight:800;}</text:p>
      <text:p text:style-name="Normal">.dpo{font-size:1rem;color:rgba(245,243,239,.28);text-decoration:line-through;margin-left:1rem;}</text:p>
      <text:p text:style-name="Normal">.dsav{display:inline-block;background:rgba(79,200,212,.1);color:var(--cyan);font-size:.78rem;padding:.3rem .8rem;margin-top:.5rem;}</text:p>
      <text:p text:style-name="Normal">.drow{display:flex;align-items:center;gap:.8rem;font-size:.82rem;color:rgba(245,243,239,.45);margin-top:1.2rem;}</text:p>
      <text:p text:style-name="Normal">.qrow{display:flex;align-items:center;gap:1.5rem;margin:2rem 0;}</text:p>
      <text:p text:style-name="Normal">.ql{font-size:.78rem;color:rgba(245,243,239,.38);letter-spacing:.1em;text-transform:uppercase;}</text:p>
      <text:p text:style-name="Normal">.qctrl{display:flex;}</text:p>
      <text:p text:style-name="Normal">.qbtn{width:38px;height:38px;background:var(--gris);border:1px solid rgba(255,255,255,.1);color:var(--blanc);font-size:1.2rem;cursor:none;transition:background .2s;}</text:p>
      <text:p text:style-name="Normal">.qbtn:hover{background:rgba(255,255,255,.08);}</text:p>
      <text:p text:style-name="Normal">.qn{width:52px;height:38px;background:var(--gris);border-top:1px solid rgba(255,255,255,.1);border-bottom:1px solid rgba(255,255,255,.1);border-<text:soft-page-break/>left:none;border-right:none;color:var(--blanc);font-family:'Syne',sans-serif;font-size:1rem;font-weight:700;text-align:center;display:flex;align-items:center;justify-content:center;}</text:p>
      <text:p text:style-name="Normal">.dbtns{display:flex;flex-direction:column;gap:1rem;}</text:p>
      <text:p text:style-name="Normal">.btn-buy{padding:1.2rem;background:var(--cyan);color:var(--noir);font-family:'DM Sans',sans-serif;font-size:.9rem;font-weight:500;letter-spacing:.15em;text-transform:uppercase;border:none;cursor:none;transition:all .3s;}</text:p>
      <text:p text:style-name="Normal">.btn-buy:hover{background:var(--blanc);transform:translateY(-2px);}</text:p>
      <text:p text:style-name="Normal">.btn-crt{padding:1.2rem;background:transparent;color:var(--blanc);font-family:'DM Sans',sans-serif;font-size:.9rem;letter-spacing:.12em;text-transform:uppercase;border:1px solid rgba(245,243,239,.2);cursor:none;transition:all .3s;}</text:p>
      <text:p text:style-name="Normal">.btn-crt:hover{border-color:rgba(245,243,239,.45);}</text:p>
      <text:p text:style-name="Normal">.dspecs{border-top:1px solid rgba(255,255,255,.06);padding-top:2rem;margin-top:2rem;}</text:p>
      <text:p text:style-name="Normal">.sp-row{display:flex;justify-content:space-between;padding:.8rem 0;border-bottom:1px solid rgba(255,255,255,.04);font-size:.85rem;}</text:p>
      <text:p text:style-name="Normal">.sk{color:rgba(245,243,239,.38);}</text:p>
      <text:p text:style-name="Normal">/* CART */</text:p>
      <text:p text:style-name="Normal">.clayout{display:grid;grid-template-columns:1fr 380px;gap:4rem;padding:4rem 5rem 8rem;}</text:p>
      <text:p text:style-name="Normal">.ctitle{font-family:'Syne',sans-serif;font-size:2.5rem;font-weight:700;margin-bottom:3rem;}</text:p>
      <text:p text:style-name="Normal">.citems{display:flex;flex-direction:column;gap:1.5rem;}</text:p>
      <text:p text:style-name="Normal">.citem{display:grid;grid-template-columns:80px 1fr auto;gap:1.5rem;align-items:center;padding:2rem;background:var(--gris);border:1px solid rgba(255,255,255,.06);}</text:p>
      <text:p text:style-name="Normal">.cimg{width:80px;height:80px;background:rgba(79,200,212,.05);border:1px solid rgba(79,200,212,.15);display:flex;align-items:center;justify-content:center;font-size:2.5rem;}</text:p>
      <text:p text:style-name="Normal">.cin{font-family:'Syne',sans-serif;font-size:1rem;font-weight:600;margin-bottom:.4rem;}</text:p>
      <text:p text:style-name="Normal">.cis{font-size:.78rem;color:rgba(245,243,239,.38);}</text:p>
      <text:p text:style-name="Normal">.cip{font-family:'Syne',sans-serif;font-size:1.4rem;font-weight:700;text-align:right;}</text:p>
      <text:soft-page-break/>
      <text:p text:style-name="Normal">.crm{font-size:.72rem;color:rgba(245,243,239,.28);cursor:none;margin-top:.5rem;display:block;text-align:right;transition:color .2s;}</text:p>
      <text:p text:style-name="Normal">.crm:hover{color:var(--rose);}</text:p>
      <text:p text:style-name="Normal">.cqrow{display:flex;align-items:center;gap:.5rem;margin-top:.8rem;}</text:p>
      <text:p text:style-name="Normal">.cqb{width:28px;height:28px;background:rgba(255,255,255,.05);border:1px solid rgba(255,255,255,.1);color:var(--blanc);font-size:1rem;cursor:none;display:flex;align-items:center;justify-content:center;transition:background .2s;}</text:p>
      <text:p text:style-name="Normal">.cqb:hover{background:rgba(255,255,255,.12);}</text:p>
      <text:p text:style-name="Normal">.cqn{font-size:.9rem;font-weight:600;width:24px;text-align:center;}</text:p>
      <text:p text:style-name="Normal">.csumm{background:var(--gris);border:1px solid rgba(255,255,255,.06);padding:2.5rem;height:fit-content;position:sticky;top:120px;}</text:p>
      <text:p text:style-name="Normal">.smt{font-family:'Syne',sans-serif;font-size:1.2rem;font-weight:700;margin-bottom:2rem;}</text:p>
      <text:p text:style-name="Normal">.smr{display:flex;justify-content:space-between;font-size:.9rem;padding:.8rem 0;border-bottom:1px solid rgba(255,255,255,.05);}</text:p>
      <text:p text:style-name="Normal">.smr:last-of-type{border-bottom:none;}</text:p>
      <text:p text:style-name="Normal">.sml{color:rgba(245,243,239,.45);}</text:p>
      <text:p text:style-name="Normal">.smtot{display:flex;justify-content:space-between;align-items:baseline;padding:1.5rem 0;border-top:1px solid rgba(255,255,255,.1);margin-top:.5rem;}</text:p>
      <text:p text:style-name="Normal">.smtlbl{font-family:'Syne',sans-serif;font-weight:700;}</text:p>
      <text:p text:style-name="Normal">.smtprc{font-family:'Syne',sans-serif;font-size:2rem;font-weight:800;color:var(--cyan);}</text:p>
      <text:p text:style-name="Normal">.promo{width:100%;background:transparent;border:1px solid rgba(255,255,255,.1);color:var(--blanc);padding:.8rem 1rem;font-family:'DM Sans',sans-serif;font-size:.85rem;margin:1.5rem 0;outline:none;transition:border-color .3s;}</text:p>
      <text:p text:style-name="Normal">.promo::placeholder{color:rgba(245,243,239,.22);}</text:p>
      <text:p text:style-name="Normal">.promo:focus{border-color:rgba(79,200,212,.5);}</text:p>
      <text:p text:style-name="Normal">.trust{display:flex;flex-direction:column;gap:.8rem;margin-top:2rem;padding-top:2rem;border-top:1px solid rgba(255,255,255,.06);}</text:p>
      <text:p text:style-name="Normal">.ti{display:flex;align-items:center;gap:.8rem;font-size:.78rem;color:rgba(245,243,239,.38);}</text:p>
      <text:p text:style-name="Normal">.cempty{text-align:center;padding:8rem 2rem;}</text:p>
      <text:soft-page-break/>
      <text:p text:style-name="Normal">.ceico{font-size:5rem;margin-bottom:2rem;opacity:.28;}</text:p>
      <text:p text:style-name="Normal">/* CHECKOUT */</text:p>
      <text:p text:style-name="Normal">.chklayout{display:grid;grid-template-columns:1fr 380px;gap:4rem;padding:4rem 5rem 8rem;}</text:p>
      <text:p text:style-name="Normal">.steps{display:flex;gap:0;margin-bottom:3rem;}</text:p>
      <text:p text:style-name="Normal">.step{display:flex;align-items:center;gap:.8rem;font-size:.78rem;letter-spacing:.1em;text-transform:uppercase;color:rgba(245,243,239,.28);}</text:p>
      <text:p text:style-name="Normal">.step.active{color:var(--cyan);}</text:p>
      <text:p text:style-name="Normal">.stepn{width:28px;height:28px;border:1px solid currentColor;border-radius:50%;display:flex;align-items:center;justify-content:center;font-size:.72rem;font-weight:700;}</text:p>
      <text:p text:style-name="Normal">.stepsep{width:40px;height:1px;background:rgba(255,255,255,.1);margin:0 1rem;}</text:p>
      <text:p text:style-name="Normal">.fsec{margin-bottom:3rem;}</text:p>
      <text:p text:style-name="Normal">.fst{font-family:'Syne',sans-serif;font-size:1rem;font-weight:700;margin-bottom:1.5rem;display:flex;align-items:center;gap:.8rem;}</text:p>
      <text:p text:style-name="Normal">.fst span{color:var(--cyan);}</text:p>
      <text:p text:style-name="Normal">.fgrd{display:grid;grid-template-columns:1fr 1fr;gap:1rem;}</text:p>
      <text:p text:style-name="Normal">.fgrd.full{grid-template-columns:1fr;}</text:p>
      <text:p text:style-name="Normal">.fld{display:flex;flex-direction:column;gap:.4rem;}</text:p>
      <text:p text:style-name="Normal">.fld label{font-size:.72rem;letter-spacing:.1em;text-transform:uppercase;color:rgba(245,243,239,.38);}</text:p>
      <text:p text:style-name="Normal">.fld input,.fld select{background:var(--gris);border:1px solid rgba(255,255,255,.08);color:var(--blanc);padding:.9rem 1rem;font-family:'DM Sans',sans-serif;font-size:.9rem;outline:none;transition:border-color .3s;width:100%;}</text:p>
      <text:p text:style-name="Normal">.fld input::placeholder{color:rgba(245,243,239,.18);}</text:p>
      <text:p text:style-name="Normal">.fld input:focus,.fld select:focus{border-color:rgba(79,200,212,.5);}</text:p>
      <text:p text:style-name="Normal">.paymeth{display:flex;gap:1rem;margin:1.5rem 0;}</text:p>
      <text:p text:style-name="Normal">.pmth{flex:1;padding:1rem;background:var(--gris);border:1px solid rgba(255,255,255,.08);text-align:center;font-size:.85rem;cursor:none;transition:all .3s;color:rgba(245,243,239,.45);}</text:p>
      <text:p text:style-name="Normal">.pmth.sel{border-color:var(--cyan);color:var(--cyan);background:rgba(79,200,212,.05);}</text:p>
      <text:soft-page-break/>
      <text:p text:style-name="Normal">.pmth:hover{border-color:rgba(79,200,212,.3);}</text:p>
      <text:p text:style-name="Normal">.btn-place{width:100%;padding:1.3rem;background:var(--cyan);color:var(--noir);font-family:'DM Sans',sans-serif;font-size:.9rem;font-weight:500;letter-spacing:.15em;text-transform:uppercase;border:none;cursor:none;transition:all .3s;margin-top:1rem;}</text:p>
      <text:p text:style-name="Normal">.btn-place:hover{background:var(--blanc);}</text:p>
      <text:p text:style-name="Normal">.mini-itm{display:flex;align-items:center;gap:1.2rem;padding:1.2rem 0;border-bottom:1px solid rgba(255,255,255,.05);}</text:p>
      <text:p text:style-name="Normal">.mimg{width:56px;height:56px;background:rgba(79,200,212,.06);border:1px solid rgba(79,200,212,.15);display:flex;align-items:center;justify-content:center;font-size:1.6rem;flex-shrink:0;}</text:p>
      <text:p text:style-name="Normal">.mnm{font-size:.85rem;font-weight:500;flex:1;}</text:p>
      <text:p text:style-name="Normal">.mpr{font-family:'Syne',sans-serif;font-size:1rem;font-weight:700;}</text:p>
      <text:p text:style-name="Normal">/* CONFIRM */</text:p>
      <text:p text:style-name="Normal">.confpage{text-align:center;padding:8rem 5rem;}</text:p>
      <text:p text:style-name="Normal">.conficon{font-size:5rem;margin-bottom:2rem;animation:cpulse 2s ease-in-out infinite;}</text:p>
      <text:p text:style-name="Normal">@keyframes cpulse{0%,100%{filter:drop-shadow(0 0 0 rgba(79,200,212,0));}50%{filter:drop-shadow(0 0 30px rgba(79,200,212,.6));}}</text:p>
      <text:p text:style-name="Normal">.ctit{font-family:'Syne',sans-serif;font-size:3rem;font-weight:800;margin-bottom:1rem;}</text:p>
      <text:p text:style-name="Normal">.csub{font-size:1rem;color:rgba(245,243,239,.45);max-width:500px;margin:0 auto 3rem;}</text:p>
      <text:p text:style-name="Normal">.ordnum{display:inline-block;padding:.5rem 1.5rem;background:rgba(79,200,212,.08);border:1px solid rgba(79,200,212,.25);color:var(--cyan);font-family:'Syne',sans-serif;font-size:1.1rem;font-weight:700;letter-spacing:.15em;margin-bottom:3rem;}</text:p>
      <text:p text:style-name="Normal">.ctrack{display:flex;justify-content:center;max-width:600px;margin:3rem auto;}</text:p>
      <text:p text:style-name="Normal">.trstep{flex:1;text-align:center;position:relative;}</text:p>
      <text:p text:style-name="Normal">.trstep::before{content:'';position:absolute;top:15px;left:50%;right:-50%;height:1px;background:rgba(255,255,255,.08);}</text:p>
      <text:p text:style-name="Normal">.trstep:last-child::before{display:none;}</text:p>
      <text:p text:style-name="Normal">.trdot{width:32px;height:32px;border-radius:50%;margin:0 auto .8rem;display:flex;align-items:center;justify-content:center;font-size:.72rem;position:relative;z-index:1;}</text:p>
      <text:soft-page-break/>
      <text:p text:style-name="Normal">.trdot.done{background:var(--cyan);color:var(--noir);}</text:p>
      <text:p text:style-name="Normal">.trdot.pend{background:var(--gris);border:1px solid rgba(255,255,255,.1);color:rgba(245,243,239,.28);}</text:p>
      <text:p text:style-name="Normal">.trnm{font-size:.7rem;color:rgba(245,243,239,.38);letter-spacing:.05em;}</text:p>
      <text:p text:style-name="Normal">/* FOOTER */</text:p>
      <text:p text:style-name="Normal">footer{padding:4rem 5rem 3rem;border-top:1px solid rgba(255,255,255,.05);display:grid;grid-template-columns:2fr 1fr 1fr;gap:4rem;}</text:p>
      <text:p text:style-name="Normal">.fbr{font-family:'Syne',sans-serif;font-size:1.2rem;font-weight:800;letter-spacing:.3em;color:rgba(245,243,239,.18);margin-bottom:1rem;}</text:p>
      <text:p text:style-name="Normal">.fds{font-size:.83rem;color:rgba(245,243,239,.28);line-height:1.75;}</text:p>
      <text:p text:style-name="Normal">.fct{font-size:.7rem;letter-spacing:.25em;text-transform:uppercase;color:var(--cyan);margin-bottom:1.2rem;}</text:p>
      <text:p text:style-name="Normal">.flks{list-style:none;display:flex;flex-direction:column;gap:.7rem;}</text:p>
      <text:p text:style-name="Normal">.flks a{font-size:.82rem;color:rgba(245,243,239,.32);text-decoration:none;cursor:none;transition:color .3s;}</text:p>
      <text:p text:style-name="Normal">.flks a:hover{color:var(--blanc);}</text:p>
      <text:p text:style-name="Normal">.fbot{padding:1.5rem 5rem;border-top:1px solid rgba(255,255,255,.04);display:flex;justify-content:space-between;font-size:.73rem;color:rgba(245,243,239,.18);}</text:p>
      <text:p text:style-name="Normal">.notif{position:fixed;bottom:2rem;right:2rem;background:var(--gris);border:1px solid rgba(79,200,212,.3);padding:1rem 1.5rem;font-size:.85rem;color:var(--blanc);z-index:1000;transform:translateX(130%);transition:transform .4s;max-width:280px;}</text:p>
      <text:p text:style-name="Normal">.notif.show{transform:translateX(0);}</text:p>
      <text:p text:style-name="Normal">.nticon{color:var(--cyan);margin-right:.5rem;}</text:p>
      <text:p text:style-name="Normal">.reveal{opacity:0;transform:translateY(40px);transition:opacity .7s,transform .7s;}</text:p>
      <text:p text:style-name="Normal">.reveal.visible{opacity:1;transform:translateY(0);}</text:p>
      <text:p text:style-name="Normal">.rd1{transition-delay:.1s;}.rd2{transition-delay:.2s;}.rd3{transition-delay:.3s;}.rd4{transition-delay:.4s;}</text:p>
      <text:p text:style-name="Normal">@keyframes fu{to{opacity:1;transform:translateY(0);}}</text:p>
      <text:p text:style-name="Normal">@media(max-width:900px){</text:p>
      <text:p text:style-name="Normal"><text:s text:c="2"/>nav{padding:1.2rem 1.5rem;}nav ul{display:none;}</text:p>
      <text:soft-page-break/>
      <text:p text:style-name="Normal"><text:s text:c="2"/>.hero-left{padding:0 1.5rem;max-width:100%;}</text:p>
      <text:p text:style-name="Normal"><text:s text:c="2"/>.hero-title{font-size:3.5rem;}</text:p>
      <text:p text:style-name="Normal"><text:s text:c="2"/>.sp{padding:5rem 1.5rem;}</text:p>
      <text:p text:style-name="Normal"><text:s text:c="2"/>.pgrid,.pdl,.clayout,.chklayout{grid-template-columns:1fr;padding:2rem 1.5rem;}</text:p>
      <text:p text:style-name="Normal"><text:s text:c="2"/>.fgrd{grid-template-columns:1fr;}</text:p>
      <text:p text:style-name="Normal"><text:s text:c="2"/>footer{grid-template-columns:1fr;padding:3rem 1.5rem;}</text:p>
      <text:p text:style-name="Normal"><text:s text:c="2"/>.fbot{padding:1.5rem;flex-direction:column;gap:.5rem;}</text:p>
      <text:p text:style-name="Normal">}</text:p>
      <text:p text:style-name="Normal">&lt;/style&gt;</text:p>
      <text:p text:style-name="Normal">&lt;/head&gt;</text:p>
      <text:p text:style-name="Normal">&lt;body&gt;</text:p>
      <text:p text:style-name="Normal">&lt;div id="cursor"&gt;&lt;/div&gt;</text:p>
      <text:p text:style-name="Normal">&lt;div id="ctrail"&gt;&lt;/div&gt;</text:p>
      <text:p text:style-name="Normal">&lt;div class="notif" id="notif"&gt;&lt;span class="nticon"&gt;✓&lt;/span&gt;&lt;span id="ntext"&gt;Ajouté !&lt;/span&gt;&lt;/div&gt;</text:p>
      <text:p text:style-name="Normal"/>
      <text:p text:style-name="Normal">&lt;nav&gt;</text:p>
      <text:p text:style-name="Normal"><text:s text:c="2"/>&lt;div class="logo"&gt;AËR&lt;span&gt;A&lt;/span&gt;&lt;/div&gt;</text:p>
      <text:p text:style-name="Normal"><text:s text:c="2"/>&lt;ul&gt;</text:p>
      <text:p text:style-name="Normal"><text:s text:c="4"/>&lt;li&gt;&lt;a href="#" onclick="goTo('home')"&gt;Accueil&lt;/a&gt;&lt;/li&gt;</text:p>
      <text:p text:style-name="Normal"><text:s text:c="4"/>&lt;li&gt;&lt;a href="#" onclick="goTo('home');setTimeout(()=&gt;document.getElementById('prodsec').scrollIntoView({behavior:'smooth'}),200)"&gt;Produits&lt;/a&gt;&lt;/li&gt;</text:p>
      <text:p text:style-name="Normal"><text:s text:c="2"/>&lt;/ul&gt;</text:p>
      <text:p text:style-name="Normal"><text:s text:c="2"/>&lt;button class="nav-cart-btn" onclick="goTo('cart')"&gt;Panier &lt;span class="cnt" id="cc"&gt;0&lt;/span&gt;&lt;/button&gt;</text:p>
      <text:p text:style-name="Normal">&lt;/nav&gt;</text:p>
      <text:p text:style-name="Normal"/>
      <text:p text:style-name="Normal">&lt;!--<text:s/><text:span text:style-name="T2">██</text:span><text:s/>HOME<text:s/><text:span text:style-name="T3">██</text:span><text:s/>--&gt;</text:p>
      <text:soft-page-break/>
      <text:p text:style-name="Normal">&lt;div class="page active" id="page-home"&gt;</text:p>
      <text:p text:style-name="Normal"><text:s text:c="2"/>&lt;section id="hero"&gt;</text:p>
      <text:p text:style-name="Normal"><text:s text:c="4"/>&lt;canvas id="hcv"&gt;&lt;/canvas&gt;</text:p>
      <text:p text:style-name="Normal"><text:s text:c="4"/>&lt;div class="hero-left"&gt;</text:p>
      <text:p text:style-name="Normal"><text:s text:c="6"/>&lt;p class="eyebrow"&gt;Canicule ? Plus jamais.&lt;/p&gt;</text:p>
      <text:p text:style-name="Normal"><text:s text:c="6"/>&lt;h1 class="hero-title"&gt;&lt;span class="ac"&gt;FROID&lt;/span&gt;&lt;br&gt;&lt;span class="gh"&gt;à portée&lt;/span&gt;&lt;br&gt;de main.&lt;/h1&gt;</text:p>
      <text:p text:style-name="Normal"><text:s text:c="6"/>&lt;p class="hero-sub"&gt;Des rafraîchisseurs d'air sélectionnés pour la chaleur extrême. Silencieux, portatifs, efficaces dès la première minute.&lt;/p&gt;</text:p>
      <text:p text:style-name="Normal"><text:s text:c="6"/>&lt;div class="hero-actions"&gt;</text:p>
      <text:p text:style-name="Normal"><text:s text:c="8"/>&lt;button class="btn-main" onclick="document.getElementById('prodsec').scrollIntoView({behavior:'smooth'})"&gt;Voir les produits&lt;/button&gt;</text:p>
      <text:p text:style-name="Normal"><text:s text:c="8"/>&lt;div class="badge-ship"&gt;&lt;strong&gt;48h&lt;/strong&gt;&lt;div&gt;&lt;div style="font-size:.65rem;color:rgba(79,200,212,.7);letter-spacing:.1em;"&gt;LIVRAISON&lt;/div&gt;&lt;div style="font-size:.65rem;color:rgba(245,243,239,.4);"&gt;Gratuite&lt;/div&gt;&lt;/div&gt;&lt;/div&gt;</text:p>
      <text:p text:style-name="Normal"><text:s text:c="6"/>&lt;/div&gt;</text:p>
      <text:p text:style-name="Normal"><text:s text:c="4"/>&lt;/div&gt;</text:p>
      <text:p text:style-name="Normal"><text:s text:c="2"/>&lt;/section&gt;</text:p>
      <text:p text:style-name="Normal"/>
      <text:p text:style-name="Normal"><text:s text:c="2"/>&lt;div class="stats-bar reveal"&gt;</text:p>
      <text:p text:style-name="Normal"><text:s text:c="4"/>&lt;div class="stat-item"&gt;&lt;div class="stn"&gt;−8°C&lt;/div&gt;&lt;div class="stl"&gt;Ressenti ambiant&lt;/div&gt;&lt;/div&gt;</text:p>
      <text:p text:style-name="Normal"><text:s text:c="4"/>&lt;div class="stat-item"&gt;&lt;div class="stn"&gt;18 dB&lt;/div&gt;&lt;div class="stl"&gt;Niveau sonore&lt;/div&gt;&lt;/div&gt;</text:p>
      <text:p text:style-name="Normal"><text:s text:c="4"/>&lt;div class="stat-item"&gt;&lt;div class="stn"&gt;72h&lt;/div&gt;&lt;div class="stl"&gt;Autonomie max&lt;/div&gt;&lt;/div&gt;</text:p>
      <text:p text:style-name="Normal"><text:s text:c="2"/>&lt;/div&gt;</text:p>
      <text:p text:style-name="Normal"/>
      <text:p text:style-name="Normal"><text:s text:c="2"/>&lt;section class="sp" id="prodsec"&gt;</text:p>
      <text:p text:style-name="Normal"><text:s text:c="4"/>&lt;p class="slabel reveal"&gt;Notre sélection canicule&lt;/p&gt;</text:p>
      <text:soft-page-break/>
      <text:p text:style-name="Normal"><text:s text:c="4"/>&lt;h2 class="stitle reveal rd1"&gt;Deux produits.&lt;br&gt;Un seul objectif.&lt;/h2&gt;</text:p>
      <text:p text:style-name="Normal"><text:s text:c="4"/>&lt;div class="pgrid"&gt;</text:p>
      <text:p text:style-name="Normal"><text:s text:c="6"/>&lt;!-- MAIN --&gt;</text:p>
      <text:p text:style-name="Normal"><text:s text:c="6"/>&lt;div class="pcm reveal rd1" onclick="goTo('product1')"&gt;</text:p>
      <text:p text:style-name="Normal"><text:s text:c="8"/>&lt;div class="cglow" style="background:var(--cyan);top:-50px;right:-50px;width:300px;height:300px;"&gt;&lt;/div&gt;</text:p>
      <text:p text:style-name="Normal"><text:s text:c="8"/>&lt;span class="cbdg bn"&gt;<text:span text:style-name="T4">⭐</text:span><text:s/>Notre #1&lt;/span&gt;</text:p>
      <text:p text:style-name="Normal"><text:s text:c="8"/>&lt;div class="cvmain"&gt;</text:p>
      <text:p text:style-name="Normal"><text:s text:c="10"/>&lt;canvas class="mcanv" data-color="79,200,212" style="position:absolute;inset:0;width:100%;height:100%;"&gt;&lt;/canvas&gt;</text:p>
      <text:p text:style-name="Normal"><text:s text:c="10"/>&lt;span class="icon-main"&gt;<text:span text:style-name="T5">🌀</text:span>&lt;/span&gt;</text:p>
      <text:p text:style-name="Normal"><text:s text:c="8"/>&lt;/div&gt;</text:p>
      <text:p text:style-name="Normal"><text:s text:c="8"/>&lt;div class="srow"&gt;&lt;span class="stars"&gt;<text:span text:style-name="T6">★★★★★</text:span>&lt;/span&gt;&lt;span class="sc"&gt;4.8<text:s/><text:span text:style-name="T7">·</text:span><text:s/>+5 000 avis&lt;/span&gt;&lt;/div&gt;</text:p>
      <text:p text:style-name="Normal"><text:s text:c="8"/>&lt;h3 class="cpn"&gt;Ventilateur sans pales&lt;br&gt;+ Télécommande&lt;/h3&gt;</text:p>
      <text:p text:style-name="Normal"><text:s text:c="8"/>&lt;p class="cpd"&gt;Silence total, flux 360°. Mural ou sur pied. Télécommande 10m incluse. Le meilleur rapport performance / silence du marché.&lt;/p&gt;</text:p>
      <text:p text:style-name="Normal"><text:s text:c="8"/>&lt;ul class="cfl"&gt;</text:p>
      <text:p text:style-name="Normal"><text:s text:c="10"/>&lt;li&gt;&lt;span class="fd"&gt;&lt;/span&gt;Sans pales — sûr pour les enfants&lt;/li&gt;</text:p>
      <text:p text:style-name="Normal"><text:s text:c="10"/>&lt;li&gt;&lt;span class="fd"&gt;&lt;/span&gt;3 vitesses + minuterie&lt;/li&gt;</text:p>
      <text:p text:style-name="Normal"><text:s text:c="10"/>&lt;li&gt;&lt;span class="fd"&gt;&lt;/span&gt;Installation mur ou bureau&lt;/li&gt;</text:p>
      <text:p text:style-name="Normal"><text:s text:c="10"/>&lt;li&gt;&lt;span class="fd"&gt;&lt;/span&gt;Note 4.8/5 · +5 000 vendus&lt;/li&gt;</text:p>
      <text:p text:style-name="Normal"><text:s text:c="8"/>&lt;/ul&gt;</text:p>
      <text:p text:style-name="Normal"><text:s text:c="8"/>&lt;div class="cpr"&gt;&lt;span class="pm"&gt;49,90 €&lt;/span&gt;&lt;span class="po"&gt;79,90 €&lt;/span&gt;&lt;span class="ps"&gt;−38%&lt;/span&gt;&lt;/div&gt;</text:p>
      <text:p text:style-name="Normal"><text:s text:c="8"/>&lt;button class="btn-add" onclick="event.stopPropagation();addToCart('Ventilateur sans pales',49.90,'<text:span text:style-name="T8">🌀</text:span>');toast('Ventilateur ajouté au panier ✓')"&gt;Ajouter au panier&lt;/button&gt;</text:p>
      <text:p text:style-name="Normal"><text:s text:c="6"/>&lt;/div&gt;</text:p>
      <text:p text:style-name="Normal"><text:s text:c="6"/>&lt;!-- SIDE --&gt;</text:p>
      <text:soft-page-break/>
      <text:p text:style-name="Normal"><text:s text:c="6"/>&lt;div class="pcs"&gt;</text:p>
      <text:p text:style-name="Normal"><text:s text:c="8"/>&lt;div class="pcsm reveal rd2" onclick="goTo('product2')"&gt;</text:p>
      <text:p text:style-name="Normal"><text:s text:c="10"/>&lt;div class="cglow" style="background:var(--lavande);top:-30px;left:-30px;width:200px;height:200px;"&gt;&lt;/div&gt;</text:p>
      <text:p text:style-name="Normal"><text:s text:c="10"/>&lt;span class="cbdg bla"&gt;Canicule 2025&lt;/span&gt;</text:p>
      <text:p text:style-name="Normal"><text:s text:c="10"/>&lt;div class="cvsm"&gt;</text:p>
      <text:p text:style-name="Normal"><text:s text:c="12"/>&lt;canvas class="mcanv" data-color="155,127,255" style="position:absolute;inset:0;width:100%;height:100%;"&gt;&lt;/canvas&gt;</text:p>
      <text:p text:style-name="Normal"><text:s text:c="12"/>&lt;span class="icon-sm"&gt;<text:span text:style-name="T9">❄️</text:span>&lt;/span&gt;</text:p>
      <text:p text:style-name="Normal"><text:s text:c="10"/>&lt;/div&gt;</text:p>
      <text:p text:style-name="Normal"><text:s text:c="10"/>&lt;h3 class="cpn" style="font-size:1.2rem;"&gt;Mini Climatiseur portable&lt;/h3&gt;</text:p>
      <text:p text:style-name="Normal"><text:s text:c="10"/>&lt;p class="cpd" style="font-size:.82rem;margin-bottom:1.2rem;"&gt;Brumisation + ventilation + purification. Refroidit en 30 s. Idéal bureau ou chambre.&lt;/p&gt;</text:p>
      <text:p text:style-name="Normal"><text:s text:c="10"/>&lt;div class="cpr"&gt;&lt;span class="pm" style="font-size:1.6rem;"&gt;39,90 €&lt;/span&gt;&lt;span class="po"&gt;59,90 €&lt;/span&gt;&lt;/div&gt;</text:p>
      <text:p text:style-name="Normal"><text:s text:c="10"/>&lt;button class="btn-ao" onclick="event.stopPropagation();addToCart('Mini Climatiseur',39.90,'<text:span text:style-name="T10">❄️</text:span>');toast('Climatiseur ajouté au panier ✓')"&gt;Ajouter au panier&lt;/button&gt;</text:p>
      <text:p text:style-name="Normal"><text:s text:c="8"/>&lt;/div&gt;</text:p>
      <text:p text:style-name="Normal"><text:s text:c="8"/>&lt;div class="pcsm reveal rd3" style="background:linear-gradient(135deg,rgba(13,13,24,1),rgba(20,14,36,1));border-color:rgba(155,127,255,.2);" onclick="addToCart('Ventilateur sans pales',49.90,'<text:span text:style-name="T11">🌀</text:span>');addToCart('Mini Climatiseur',39.90,'<text:span text:style-name="T12">❄️</text:span>');toast('Bundle ajouté !<text:s/><text:span text:style-name="T13">🎉</text:span>')"&gt;</text:p>
      <text:p text:style-name="Normal"><text:s text:c="10"/>&lt;span class="cbdg bbu"&gt;Bundle −27%&lt;/span&gt;</text:p>
      <text:p text:style-name="Normal"><text:s text:c="10"/>&lt;div style="display:flex;gap:.5rem;font-size:2.4rem;margin-bottom:1.2rem;justify-content:center;"&gt;<text:span text:style-name="T14">🌀</text:span>&lt;span style="color:rgba(245,243,239,.18);font-size:.9rem;align-self:center;"&gt;+&lt;/span&gt;<text:span text:style-name="T15">❄️</text:span>&lt;/div&gt;</text:p>
      <text:p text:style-name="Normal"><text:s text:c="10"/>&lt;h3 class="cpn" style="font-size:1.1rem;color:var(--lavande);"&gt;Bundle Fraîcheur Totale&lt;/h3&gt;</text:p>
      <text:p text:style-name="Normal"><text:s text:c="10"/>&lt;p class="cpd" style="font-size:.8rem;margin-bottom:1rem;"&gt;Les deux ensemble. La solution complète maison + bureau pour toute la saison.&lt;/p&gt;</text:p>
      <text:soft-page-break/>
      <text:p text:style-name="Normal"><text:s text:c="10"/>&lt;div class="cpr"&gt;&lt;span class="pm" style="font-size:1.5rem;color:var(--lavande);"&gt;79,90 €&lt;/span&gt;&lt;span class="po"&gt;109,80 €&lt;/span&gt;&lt;span class="ps" style="background:rgba(155,127,255,.1);color:var(--lavande);"&gt;−27%&lt;/span&gt;&lt;/div&gt;</text:p>
      <text:p text:style-name="Normal"><text:s text:c="10"/>&lt;button class="btn-ao" onclick="event.stopPropagation()"&gt;Profiter du bundle →&lt;/button&gt;</text:p>
      <text:p text:style-name="Normal"><text:s text:c="8"/>&lt;/div&gt;</text:p>
      <text:p text:style-name="Normal"><text:s text:c="6"/>&lt;/div&gt;</text:p>
      <text:p text:style-name="Normal"><text:s text:c="4"/>&lt;/div&gt;</text:p>
      <text:p text:style-name="Normal"><text:s text:c="2"/>&lt;/section&gt;</text:p>
      <text:p text:style-name="Normal"/>
      <text:p text:style-name="Normal"><text:s text:c="2"/>&lt;section style="padding:0 5rem 10rem;"&gt;</text:p>
      <text:p text:style-name="Normal"><text:s text:c="4"/>&lt;p class="slabel reveal"&gt;Pourquoi choisir AËRA&lt;/p&gt;</text:p>
      <text:p text:style-name="Normal"><text:s text:c="4"/>&lt;h2 class="stitle reveal rd1" style="margin-bottom:3rem;"&gt;Simple. Direct. Froid.&lt;/h2&gt;</text:p>
      <text:p text:style-name="Normal"><text:s text:c="4"/>&lt;div class="fgrid"&gt;</text:p>
      <text:p text:style-name="Normal"><text:s text:c="6"/>&lt;div class="fcard reveal rd1"&gt;&lt;div style="font-size:2rem;"&gt;<text:span text:style-name="T16">⚡</text:span>&lt;/div&gt;&lt;h3&gt;Livraison 48h express&lt;/h3&gt;&lt;p&gt;Commandez avant 14h, livr<text:span text:style-name="T17">é</text:span><text:s/>le lendemain. Parce que la canicule n'attend pas.&lt;/p&gt;&lt;/div&gt;</text:p>
      <text:p text:style-name="Normal"><text:s text:c="6"/>&lt;div class="fcard reveal rd2"&gt;&lt;div style="font-size:2rem;"&gt;<text:span text:style-name="T18">🔄</text:span>&lt;/div&gt;&lt;h3&gt;Retour gratuit 30 jours&lt;/h3&gt;&lt;p&gt;Pas satisfait ? On rembourse, sans poser de questions, dans les 30 jours.&lt;/p&gt;&lt;/div&gt;</text:p>
      <text:p text:style-name="Normal"><text:s text:c="6"/>&lt;div class="fcard reveal rd3"&gt;&lt;div style="font-size:2rem;"&gt;<text:span text:style-name="T19">🔒</text:span>&lt;/div&gt;&lt;h3&gt;Paiement 100% sécurisé&lt;/h3&gt;&lt;p&gt;CB, PayPal, 3× sans frais. Données chiffrées, jamais revendues.&lt;/p&gt;&lt;/div&gt;</text:p>
      <text:p text:style-name="Normal"><text:s text:c="4"/>&lt;/div&gt;</text:p>
      <text:p text:style-name="Normal"><text:s text:c="2"/>&lt;/section&gt;</text:p>
      <text:p text:style-name="Normal"/>
      <text:p text:style-name="Normal"><text:s text:c="2"/>&lt;footer&gt;</text:p>
      <text:p text:style-name="Normal"><text:s text:c="4"/>&lt;div&gt;&lt;div class="fbr"&gt;AËRA&lt;/div&gt;&lt;p class="fds"&gt;Des rafraîchisseurs sélectionnés avec soin. Livrés vite. Garantis sans surprise.&lt;/p&gt;&lt;/div&gt;</text:p>
      <text:p text:style-name="Normal"><text:s text:c="4"/>&lt;div&gt;&lt;p class="fct"&gt;Navigation&lt;/p&gt;&lt;ul class="flks"&gt;&lt;li&gt;&lt;a href="#" onclick="goTo('home')"&gt;Accueil&lt;/a&gt;&lt;/li&gt;&lt;li&gt;&lt;a href="#" onclick="goTo('product1')"&gt;Ventilateur sans pales&lt;/a&gt;&lt;/li&gt;&lt;li&gt;&lt;a href="#"<text:s/><text:soft-page-break/>onclick="goTo('product2')"&gt;Mini climatiseur&lt;/a&gt;&lt;/li&gt;&lt;li&gt;&lt;a href="#" onclick="goTo('cart')"&gt;Panier&lt;/a&gt;&lt;/li&gt;&lt;/ul&gt;&lt;/div&gt;</text:p>
      <text:p text:style-name="Normal"><text:s text:c="4"/>&lt;div&gt;&lt;p class="fct"&gt;Aide&lt;/p&gt;&lt;ul class="flks"&gt;&lt;li&gt;&lt;a href="#"&gt;Livraison&lt;/a&gt;&lt;/li&gt;&lt;li&gt;&lt;a href="#"&gt;Retours&lt;/a&gt;&lt;/li&gt;&lt;li&gt;&lt;a href="#"&gt;Contact&lt;/a&gt;&lt;/li&gt;&lt;li&gt;&lt;a href="#"&gt;Mentions légales&lt;/a&gt;&lt;/li&gt;&lt;/ul&gt;&lt;/div&gt;</text:p>
      <text:p text:style-name="Normal"><text:s text:c="2"/>&lt;/footer&gt;</text:p>
      <text:p text:style-name="Normal"><text:s text:c="2"/>&lt;div class="fbot"&gt;&lt;span&gt;© 2025 AËRA. Tous droits réservés.&lt;/span&gt;&lt;span&gt;SSL · RGPD · Paiements sécurisés&lt;/span&gt;&lt;/div&gt;</text:p>
      <text:p text:style-name="Normal">&lt;/div&gt;</text:p>
      <text:p text:style-name="Normal"/>
      <text:p text:style-name="Normal">&lt;!--<text:s/><text:span text:style-name="T20">██</text:span><text:s/>PRODUIT 1<text:s/><text:span text:style-name="T21">██</text:span><text:s/>--&gt;</text:p>
      <text:p text:style-name="Normal">&lt;div class="page" id="page-product1"&gt;</text:p>
      <text:p text:style-name="Normal"><text:s text:c="2"/>&lt;div class="pdl"&gt;</text:p>
      <text:p text:style-name="Normal"><text:s text:c="4"/>&lt;div&gt;</text:p>
      <text:p text:style-name="Normal"><text:s text:c="6"/>&lt;div class="pvb"&gt;</text:p>
      <text:p text:style-name="Normal"><text:s text:c="8"/>&lt;canvas id="pv1" style="position:absolute;inset:0;width:100%;height:100%;"&gt;&lt;/canvas&gt;</text:p>
      <text:p text:style-name="Normal"><text:s text:c="8"/>&lt;div class="pbi"&gt;<text:span text:style-name="T22">🌀</text:span>&lt;/div&gt;</text:p>
      <text:p text:style-name="Normal"><text:s text:c="6"/>&lt;/div&gt;</text:p>
      <text:p text:style-name="Normal"><text:s text:c="6"/>&lt;div class="pthmbs"&gt;&lt;div class="thmb active"&gt;<text:span text:style-name="T23">🌀</text:span>&lt;/div&gt;&lt;div class="thmb"&gt;<text:span text:style-name="T24">📐</text:span>&lt;/div&gt;&lt;div class="thmb"&gt;<text:span text:style-name="T25">🔌</text:span>&lt;/div&gt;&lt;/div&gt;</text:p>
      <text:p text:style-name="Normal"><text:s text:c="4"/>&lt;/div&gt;</text:p>
      <text:p text:style-name="Normal"><text:s text:c="4"/>&lt;div&gt;</text:p>
      <text:p text:style-name="Normal"><text:s text:c="6"/>&lt;div class="bcrumb"&gt;&lt;span onclick="goTo('home')"&gt;Accueil&lt;/span&gt;&lt;span style="opacity:.3"&gt;›&lt;/span&gt;&lt;span style="color:var(--blanc)"&gt;Ventilateur sans pales&lt;/span&gt;&lt;/div&gt;</text:p>
      <text:p text:style-name="Normal"><text:s text:c="6"/>&lt;div class="srow"&gt;&lt;span class="stars"&gt;<text:span text:style-name="T26">★★★★★</text:span>&lt;/span&gt;&lt;span class="sc"&gt;4.8<text:s/><text:span text:style-name="T27">·</text:span><text:s/>5 200 avis v<text:span text:style-name="T28">é</text:span>rifi<text:span text:style-name="T29">é</text:span>s&lt;/span&gt;&lt;/div&gt;</text:p>
      <text:p text:style-name="Normal"><text:s text:c="6"/>&lt;h1 class="dtitle"&gt;Ventilateur sans pales&lt;br&gt;+ Télécommande incluse&lt;/h1&gt;</text:p>
      <text:p text:style-name="Normal"><text:s text:c="6"/>&lt;p style="font-size:.9rem;color:rgba(245,243,239,.45);line-height:1.75;margin-bottom:1.5rem;"&gt;Technologie sans pales : silence total et flux d'air puissant 360°. La<text:s/><text:soft-page-break/>télécommande vous permet de tout contrôler depuis votre canapé ou votre lit. Sûr pour toute la famille.&lt;/p&gt;</text:p>
      <text:p text:style-name="Normal"><text:s text:c="6"/>&lt;div class="dprice-block"&gt;</text:p>
      <text:p text:style-name="Normal"><text:s text:c="8"/>&lt;div&gt;&lt;span class="dpb"&gt;49,90 €&lt;/span&gt;&lt;span class="dpo"&gt;79,90 €&lt;/span&gt;&lt;/div&gt;</text:p>
      <text:p text:style-name="Normal"><text:s text:c="8"/>&lt;span class="dsav"&gt;Économie de 30 € — Offre canicule&lt;/span&gt;</text:p>
      <text:p text:style-name="Normal"><text:s text:c="8"/>&lt;div class="drow"&gt;&lt;span&gt;<text:span text:style-name="T30">🚚</text:span>&lt;/span&gt;&lt;span&gt;Livraison gratuite — estimée 4–9 juillet&lt;/span&gt;&lt;/div&gt;</text:p>
      <text:p text:style-name="Normal"><text:s text:c="6"/>&lt;/div&gt;</text:p>
      <text:p text:style-name="Normal"><text:s text:c="6"/>&lt;div class="qrow"&gt;</text:p>
      <text:p text:style-name="Normal"><text:s text:c="8"/>&lt;span class="ql"&gt;Qté&lt;/span&gt;</text:p>
      <text:p text:style-name="Normal"><text:s text:c="8"/>&lt;div class="qctrl"&gt;</text:p>
      <text:p text:style-name="Normal"><text:s text:c="10"/>&lt;button class="qbtn" onclick="chgQty(-1,'q1')"&gt;−&lt;/button&gt;</text:p>
      <text:p text:style-name="Normal"><text:s text:c="10"/>&lt;div class="qn" id="q1"&gt;1&lt;/div&gt;</text:p>
      <text:p text:style-name="Normal"><text:s text:c="10"/>&lt;button class="qbtn" onclick="chgQty(1,'q1')"&gt;+&lt;/button&gt;</text:p>
      <text:p text:style-name="Normal"><text:s text:c="8"/>&lt;/div&gt;</text:p>
      <text:p text:style-name="Normal"><text:s text:c="6"/>&lt;/div&gt;</text:p>
      <text:p text:style-name="Normal"><text:s text:c="6"/>&lt;div class="dbtns"&gt;</text:p>
      <text:p text:style-name="Normal"><text:s text:c="8"/>&lt;button class="btn-buy" onclick="addToCart('Ventilateur sans pales',49.90,'<text:span text:style-name="T31">🌀</text:span>');goTo('checkout');toast('Commande en cours...')"&gt;Acheter maintenant&lt;/button&gt;</text:p>
      <text:p text:style-name="Normal"><text:s text:c="8"/>&lt;button class="btn-crt" onclick="addToCart('Ventilateur sans pales',49.90,'<text:span text:style-name="T32">🌀</text:span>');toast('Ventilateur ajouté au panier ✓')"&gt;Ajouter au panier&lt;/button&gt;</text:p>
      <text:p text:style-name="Normal"><text:s text:c="6"/>&lt;/div&gt;</text:p>
      <text:p text:style-name="Normal"><text:s text:c="6"/>&lt;div class="dspecs"&gt;</text:p>
      <text:p text:style-name="Normal"><text:s text:c="8"/>&lt;div class="sp-row"&gt;&lt;span class="sk"&gt;Niveau sonore&lt;/span&gt;&lt;span&gt;18 dB — quasi inaudible&lt;/span&gt;&lt;/div&gt;</text:p>
      <text:p text:style-name="Normal"><text:s text:c="8"/>&lt;div class="sp-row"&gt;&lt;span class="sk"&gt;Vitesses&lt;/span&gt;&lt;span&gt;3 niveaux + mode nuit&lt;/span&gt;&lt;/div&gt;</text:p>
      <text:p text:style-name="Normal"><text:s text:c="8"/>&lt;div class="sp-row"&gt;&lt;span class="sk"&gt;Télécommande&lt;/span&gt;&lt;span&gt;Incluse — portée 10m&lt;/span&gt;&lt;/div&gt;</text:p>
      <text:soft-page-break/>
      <text:p text:style-name="Normal"><text:s text:c="8"/>&lt;div class="sp-row"&gt;&lt;span class="sk"&gt;Installation&lt;/span&gt;&lt;span&gt;Mural ou sur pied&lt;/span&gt;&lt;/div&gt;</text:p>
      <text:p text:style-name="Normal"><text:s text:c="8"/>&lt;div class="sp-row"&gt;&lt;span class="sk"&gt;Alimentation&lt;/span&gt;&lt;span&gt;Secteur (Plug-In)&lt;/span&gt;&lt;/div&gt;</text:p>
      <text:p text:style-name="Normal"><text:s text:c="8"/>&lt;div class="sp-row"&gt;&lt;span class="sk"&gt;Garantie&lt;/span&gt;&lt;span&gt;12 mois + retour 30j&lt;/span&gt;&lt;/div&gt;</text:p>
      <text:p text:style-name="Normal"><text:s text:c="6"/>&lt;/div&gt;</text:p>
      <text:p text:style-name="Normal"><text:s text:c="4"/>&lt;/div&gt;</text:p>
      <text:p text:style-name="Normal"><text:s text:c="2"/>&lt;/div&gt;</text:p>
      <text:p text:style-name="Normal"><text:s text:c="2"/>&lt;footer&gt;&lt;div&gt;&lt;div class="fbr"&gt;AËRA&lt;/div&gt;&lt;p class="fds"&gt;Sélection canicule 2025.&lt;/p&gt;&lt;/div&gt;&lt;div&gt;&lt;p class="fct"&gt;Navigation&lt;/p&gt;&lt;ul class="flks"&gt;&lt;li&gt;&lt;a href="#" onclick="goTo('home')"&gt;Accueil&lt;/a&gt;&lt;/li&gt;&lt;li&gt;&lt;a href="#" onclick="goTo('cart')"&gt;Panier&lt;/a&gt;&lt;/li&gt;&lt;/ul&gt;&lt;/div&gt;&lt;div&gt;&lt;p class="fct"&gt;Aide&lt;/p&gt;&lt;ul class="flks"&gt;&lt;li&gt;&lt;a href="#"&gt;Contact&lt;/a&gt;&lt;/li&gt;&lt;li&gt;&lt;a href="#"&gt;Retours&lt;/a&gt;&lt;/li&gt;&lt;/ul&gt;&lt;/div&gt;&lt;/footer&gt;</text:p>
      <text:p text:style-name="Normal"><text:s text:c="2"/>&lt;div class="fbot"&gt;&lt;span&gt;© 2025 AËRA&lt;/span&gt;&lt;span&gt;SSL · RGPD&lt;/span&gt;&lt;/div&gt;</text:p>
      <text:p text:style-name="Normal">&lt;/div&gt;</text:p>
      <text:p text:style-name="Normal"/>
      <text:p text:style-name="Normal">&lt;!--<text:s/><text:span text:style-name="T33">██</text:span><text:s/>PRODUIT 2<text:s/><text:span text:style-name="T34">██</text:span><text:s/>--&gt;</text:p>
      <text:p text:style-name="Normal">&lt;div class="page" id="page-product2"&gt;</text:p>
      <text:p text:style-name="Normal"><text:s text:c="2"/>&lt;div class="pdl"&gt;</text:p>
      <text:p text:style-name="Normal"><text:s text:c="4"/>&lt;div&gt;</text:p>
      <text:p text:style-name="Normal"><text:s text:c="6"/>&lt;div class="pvb" style="border-color:rgba(155,127,255,.2);"&gt;</text:p>
      <text:p text:style-name="Normal"><text:s text:c="8"/>&lt;canvas id="pv2" style="position:absolute;inset:0;width:100%;height:100%;"&gt;&lt;/canvas&gt;</text:p>
      <text:p text:style-name="Normal"><text:s text:c="8"/>&lt;div class="pbi" style="filter:drop-shadow(0 0 60px rgba(155,127,255,.55));"&gt;<text:span text:style-name="T35">❄️</text:span>&lt;/div&gt;</text:p>
      <text:p text:style-name="Normal"><text:s text:c="6"/>&lt;/div&gt;</text:p>
      <text:p text:style-name="Normal"><text:s text:c="6"/>&lt;div class="pthmbs"&gt;&lt;div class="thmb active"&gt;<text:span text:style-name="T36">❄️</text:span>&lt;/div&gt;&lt;div class="thmb"&gt;<text:span text:style-name="T37">💧</text:span>&lt;/div&gt;&lt;div class="thmb"&gt;<text:span text:style-name="T38">🔌</text:span>&lt;/div&gt;&lt;/div&gt;</text:p>
      <text:p text:style-name="Normal"><text:s text:c="4"/>&lt;/div&gt;</text:p>
      <text:soft-page-break/>
      <text:p text:style-name="Normal"><text:s text:c="4"/>&lt;div&gt;</text:p>
      <text:p text:style-name="Normal"><text:s text:c="6"/>&lt;div class="bcrumb"&gt;&lt;span onclick="goTo('home')"&gt;Accueil&lt;/span&gt;&lt;span style="opacity:.3"&gt;›&lt;/span&gt;&lt;span style="color:var(--blanc)"&gt;Mini Climatiseur&lt;/span&gt;&lt;/div&gt;</text:p>
      <text:p text:style-name="Normal"><text:s text:c="6"/>&lt;div class="srow"&gt;&lt;span class="stars"&gt;<text:span text:style-name="T39">★★★★☆</text:span>&lt;/span&gt;&lt;span class="sc"&gt;4.2<text:s/><text:span text:style-name="T40">·</text:span><text:s/>220 avis v<text:span text:style-name="T41">é</text:span>rifi<text:span text:style-name="T42">é</text:span>s&lt;/span&gt;&lt;/div&gt;</text:p>
      <text:p text:style-name="Normal"><text:s text:c="6"/>&lt;h1 class="dtitle"&gt;Mini Climatiseur&lt;br&gt;de bureau portable&lt;/h1&gt;</text:p>
      <text:p text:style-name="Normal"><text:s text:c="6"/>&lt;p style="font-size:.9rem;color:rgba(245,243,239,.45);line-height:1.75;margin-bottom:1.5rem;"&gt;Brumisation froide, ventilation et purification en un seul appareil compact. Refroidit l'ambiance de 8°C en 30 secondes. Silencieux, portable, rechargeable USB-C.&lt;/p&gt;</text:p>
      <text:p text:style-name="Normal"><text:s text:c="6"/>&lt;div class="dprice-block" style="border-color:rgba(155,127,255,.15);"&gt;</text:p>
      <text:p text:style-name="Normal"><text:s text:c="8"/>&lt;div&gt;&lt;span class="dpb" style="color:var(--lavande);"&gt;39,90 €&lt;/span&gt;&lt;span class="dpo"&gt;59,90 €&lt;/span&gt;&lt;/div&gt;</text:p>
      <text:p text:style-name="Normal"><text:s text:c="8"/>&lt;span class="dsav" style="background:rgba(155,127,255,.08);color:var(--lavande);"&gt;Économie de 20 € — Offre limitée&lt;/span&gt;</text:p>
      <text:p text:style-name="Normal"><text:s text:c="8"/>&lt;div class="drow"&gt;&lt;span&gt;<text:span text:style-name="T43">🚚</text:span>&lt;/span&gt;&lt;span&gt;Livraison gratuite — estimée 4–9 juillet&lt;/span&gt;&lt;/div&gt;</text:p>
      <text:p text:style-name="Normal"><text:s text:c="6"/>&lt;/div&gt;</text:p>
      <text:p text:style-name="Normal"><text:s text:c="6"/>&lt;div class="qrow"&gt;</text:p>
      <text:p text:style-name="Normal"><text:s text:c="8"/>&lt;span class="ql"&gt;Qté&lt;/span&gt;</text:p>
      <text:p text:style-name="Normal"><text:s text:c="8"/>&lt;div class="qctrl"&gt;</text:p>
      <text:p text:style-name="Normal"><text:s text:c="10"/>&lt;button class="qbtn" onclick="chgQty(-1,'q2')"&gt;−&lt;/button&gt;</text:p>
      <text:p text:style-name="Normal"><text:s text:c="10"/>&lt;div class="qn" id="q2"&gt;1&lt;/div&gt;</text:p>
      <text:p text:style-name="Normal"><text:s text:c="10"/>&lt;button class="qbtn" onclick="chgQty(1,'q2')"&gt;+&lt;/button&gt;</text:p>
      <text:p text:style-name="Normal"><text:s text:c="8"/>&lt;/div&gt;</text:p>
      <text:p text:style-name="Normal"><text:s text:c="6"/>&lt;/div&gt;</text:p>
      <text:p text:style-name="Normal"><text:s text:c="6"/>&lt;div class="dbtns"&gt;</text:p>
      <text:p text:style-name="Normal"><text:s text:c="8"/>&lt;button class="btn-buy" style="background:var(--lavande);" onclick="addToCart('Mini Climatiseur',39.90,'<text:span text:style-name="T44">❄️</text:span>');goTo('checkout');toast('Commande en cours...')"&gt;Acheter maintenant&lt;/button&gt;</text:p>
      <text:soft-page-break/>
      <text:p text:style-name="Normal"><text:s text:c="8"/>&lt;button class="btn-crt" onclick="addToCart('Mini Climatiseur',39.90,'<text:span text:style-name="T45">❄️</text:span>');toast('Climatiseur ajouté au panier ✓')"&gt;Ajouter au panier&lt;/button&gt;</text:p>
      <text:p text:style-name="Normal"><text:s text:c="6"/>&lt;/div&gt;</text:p>
      <text:p text:style-name="Normal"><text:s text:c="6"/>&lt;div class="dspecs"&gt;</text:p>
      <text:p text:style-name="Normal"><text:s text:c="8"/>&lt;div class="sp-row"&gt;&lt;span class="sk"&gt;Fonctions&lt;/span&gt;&lt;span&gt;Ventilation + Brumisation + Purification&lt;/span&gt;&lt;/div&gt;</text:p>
      <text:p text:style-name="Normal"><text:s text:c="8"/>&lt;div class="sp-row"&gt;&lt;span class="sk"&gt;Réservoir&lt;/span&gt;&lt;span&gt;600 ml — autonomie ~8h&lt;/span&gt;&lt;/div&gt;</text:p>
      <text:p text:style-name="Normal"><text:s text:c="8"/>&lt;div class="sp-row"&gt;&lt;span class="sk"&gt;Alimentation&lt;/span&gt;&lt;span&gt;USB-C&lt;/span&gt;&lt;/div&gt;</text:p>
      <text:p text:style-name="Normal"><text:s text:c="8"/>&lt;div class="sp-row"&gt;&lt;span class="sk"&gt;Poids&lt;/span&gt;&lt;span&gt;780g — ultra-portable&lt;/span&gt;&lt;/div&gt;</text:p>
      <text:p text:style-name="Normal"><text:s text:c="8"/>&lt;div class="sp-row"&gt;&lt;span class="sk"&gt;Modes&lt;/span&gt;&lt;span&gt;Normal, Sommeil, Naturel&lt;/span&gt;&lt;/div&gt;</text:p>
      <text:p text:style-name="Normal"><text:s text:c="8"/>&lt;div class="sp-row"&gt;&lt;span class="sk"&gt;Garantie&lt;/span&gt;&lt;span&gt;12 mois + retour 30j&lt;/span&gt;&lt;/div&gt;</text:p>
      <text:p text:style-name="Normal"><text:s text:c="6"/>&lt;/div&gt;</text:p>
      <text:p text:style-name="Normal"><text:s text:c="4"/>&lt;/div&gt;</text:p>
      <text:p text:style-name="Normal"><text:s text:c="2"/>&lt;/div&gt;</text:p>
      <text:p text:style-name="Normal"><text:s text:c="2"/>&lt;footer&gt;&lt;div&gt;&lt;div class="fbr"&gt;AËRA&lt;/div&gt;&lt;p class="fds"&gt;Sélection canicule 2025.&lt;/p&gt;&lt;/div&gt;&lt;div&gt;&lt;p class="fct"&gt;Navigation&lt;/p&gt;&lt;ul class="flks"&gt;&lt;li&gt;&lt;a href="#" onclick="goTo('home')"&gt;Accueil&lt;/a&gt;&lt;/li&gt;&lt;li&gt;&lt;a href="#" onclick="goTo('cart')"&gt;Panier&lt;/a&gt;&lt;/li&gt;&lt;/ul&gt;&lt;/div&gt;&lt;div&gt;&lt;p class="fct"&gt;Aide&lt;/p&gt;&lt;ul class="flks"&gt;&lt;li&gt;&lt;a href="#"&gt;Contact&lt;/a&gt;&lt;/li&gt;&lt;li&gt;&lt;a href="#"&gt;Retours&lt;/a&gt;&lt;/li&gt;&lt;/ul&gt;&lt;/div&gt;&lt;/footer&gt;</text:p>
      <text:p text:style-name="Normal"><text:s text:c="2"/>&lt;div class="fbot"&gt;&lt;span&gt;© 2025 AËRA&lt;/span&gt;&lt;span&gt;SSL · RGPD&lt;/span&gt;&lt;/div&gt;</text:p>
      <text:p text:style-name="Normal">&lt;/div&gt;</text:p>
      <text:p text:style-name="Normal"/>
      <text:p text:style-name="Normal">&lt;!--<text:s/><text:span text:style-name="T46">██</text:span><text:s/>PANIER<text:s/><text:span text:style-name="T47">██</text:span><text:s/>--&gt;</text:p>
      <text:p text:style-name="Normal">&lt;div class="page" id="page-cart"&gt;</text:p>
      <text:p text:style-name="Normal"><text:s text:c="2"/>&lt;div class="clayout"&gt;</text:p>
      <text:soft-page-break/>
      <text:p text:style-name="Normal"><text:s text:c="4"/>&lt;div&gt;</text:p>
      <text:p text:style-name="Normal"><text:s text:c="6"/>&lt;h1 class="ctitle"&gt;Votre panier&lt;/h1&gt;</text:p>
      <text:p text:style-name="Normal"><text:s text:c="6"/>&lt;div id="cart-container"&gt;&lt;/div&gt;</text:p>
      <text:p text:style-name="Normal"><text:s text:c="4"/>&lt;/div&gt;</text:p>
      <text:p text:style-name="Normal"><text:s text:c="4"/>&lt;div class="csumm"&gt;</text:p>
      <text:p text:style-name="Normal"><text:s text:c="6"/>&lt;h2 class="smt"&gt;Récapitulatif&lt;/h2&gt;</text:p>
      <text:p text:style-name="Normal"><text:s text:c="6"/>&lt;div class="smr"&gt;&lt;span class="sml"&gt;Sous-total&lt;/span&gt;&lt;span id="sub-tot"&gt;0,00 €&lt;/span&gt;&lt;/div&gt;</text:p>
      <text:p text:style-name="Normal"><text:s text:c="6"/>&lt;div class="smr"&gt;&lt;span class="sml"&gt;Livraison&lt;/span&gt;&lt;span style="color:var(--cyan)"&gt;Gratuite&lt;/span&gt;&lt;/div&gt;</text:p>
      <text:p text:style-name="Normal"><text:s text:c="6"/>&lt;div class="smr"&gt;&lt;span class="sml"&gt;Code promo&lt;/span&gt;&lt;span style="color:rgba(245,243,239,.28)"&gt;—&lt;/span&gt;&lt;/div&gt;</text:p>
      <text:p text:style-name="Normal"><text:s text:c="6"/>&lt;div class="smtot"&gt;&lt;span class="smtlbl"&gt;Total&lt;/span&gt;&lt;span class="smtprc" id="tot-price"&gt;0,00 €&lt;/span&gt;&lt;/div&gt;</text:p>
      <text:p text:style-name="Normal"><text:s text:c="6"/>&lt;input class="promo" placeholder="Code promo"&gt;</text:p>
      <text:p text:style-name="Normal"><text:s text:c="6"/>&lt;button class="btn-main" style="width:100%;padding:1.1rem;" onclick="goTo('checkout')"&gt;Commander →&lt;/button&gt;</text:p>
      <text:p text:style-name="Normal"><text:s text:c="6"/>&lt;button class="btn-ghost" style="width:100%;padding:1rem;margin-top:.8rem;" onclick="goTo('home')"&gt;Continuer mes achats&lt;/button&gt;</text:p>
      <text:p text:style-name="Normal"><text:s text:c="6"/>&lt;div class="trust"&gt;</text:p>
      <text:p text:style-name="Normal"><text:s text:c="8"/>&lt;div class="ti"&gt;&lt;span style="color:var(--cyan)"&gt;<text:span text:style-name="T48">🔒</text:span>&lt;/span&gt;Paiement 100% sécurisé&lt;/div&gt;</text:p>
      <text:p text:style-name="Normal"><text:s text:c="8"/>&lt;div class="ti"&gt;&lt;span style="color:var(--cyan)"&gt;<text:span text:style-name="T49">🚚</text:span>&lt;/span&gt;Livraison gratuite&lt;/div&gt;</text:p>
      <text:p text:style-name="Normal"><text:s text:c="8"/>&lt;div class="ti"&gt;&lt;span style="color:var(--cyan)"&gt;<text:span text:style-name="T50">🔄</text:span>&lt;/span&gt;Retour gratuit 30 jours&lt;/div&gt;</text:p>
      <text:p text:style-name="Normal"><text:s text:c="6"/>&lt;/div&gt;</text:p>
      <text:p text:style-name="Normal"><text:s text:c="4"/>&lt;/div&gt;</text:p>
      <text:p text:style-name="Normal"><text:s text:c="2"/>&lt;/div&gt;</text:p>
      <text:p text:style-name="Normal">&lt;/div&gt;</text:p>
      <text:p text:style-name="Normal"/>
      <text:soft-page-break/>
      <text:p text:style-name="Normal">&lt;!--<text:s/><text:span text:style-name="T51">██</text:span><text:s/>CHECKOUT<text:s/><text:span text:style-name="T52">██</text:span><text:s/>--&gt;</text:p>
      <text:p text:style-name="Normal">&lt;div class="page" id="page-checkout"&gt;</text:p>
      <text:p text:style-name="Normal"><text:s text:c="2"/>&lt;div class="chklayout"&gt;</text:p>
      <text:p text:style-name="Normal"><text:s text:c="4"/>&lt;div&gt;</text:p>
      <text:p text:style-name="Normal"><text:s text:c="6"/>&lt;div class="steps"&gt;</text:p>
      <text:p text:style-name="Normal"><text:s text:c="8"/>&lt;div class="step active"&gt;&lt;div class="stepn"&gt;1&lt;/div&gt;Livraison&lt;/div&gt;</text:p>
      <text:p text:style-name="Normal"><text:s text:c="8"/>&lt;div class="stepsep"&gt;&lt;/div&gt;</text:p>
      <text:p text:style-name="Normal"><text:s text:c="8"/>&lt;div class="step"&gt;&lt;div class="stepn"&gt;2&lt;/div&gt;Paiement&lt;/div&gt;</text:p>
      <text:p text:style-name="Normal"><text:s text:c="8"/>&lt;div class="stepsep"&gt;&lt;/div&gt;</text:p>
      <text:p text:style-name="Normal"><text:s text:c="8"/>&lt;div class="step"&gt;&lt;div class="stepn"&gt;3&lt;/div&gt;Confirmation&lt;/div&gt;</text:p>
      <text:p text:style-name="Normal"><text:s text:c="6"/>&lt;/div&gt;</text:p>
      <text:p text:style-name="Normal"><text:s text:c="6"/>&lt;div class="fsec"&gt;</text:p>
      <text:p text:style-name="Normal"><text:s text:c="8"/>&lt;h2 class="fst"&gt;&lt;span&gt;01&lt;/span&gt; Vos coordonnées&lt;/h2&gt;</text:p>
      <text:p text:style-name="Normal"><text:s text:c="8"/>&lt;div class="fgrd"&gt;</text:p>
      <text:p text:style-name="Normal"><text:s text:c="10"/>&lt;div class="fld"&gt;&lt;label&gt;Prénom&lt;/label&gt;&lt;input placeholder="Jean"&gt;&lt;/div&gt;</text:p>
      <text:p text:style-name="Normal"><text:s text:c="10"/>&lt;div class="fld"&gt;&lt;label&gt;Nom&lt;/label&gt;&lt;input placeholder="Dupont"&gt;&lt;/div&gt;</text:p>
      <text:p text:style-name="Normal"><text:s text:c="10"/>&lt;div class="fld"&gt;&lt;label&gt;Email&lt;/label&gt;&lt;input type="email" placeholder="jean@email.com"&gt;&lt;/div&gt;</text:p>
      <text:p text:style-name="Normal"><text:s text:c="10"/>&lt;div class="fld"&gt;&lt;label&gt;Téléphone&lt;/label&gt;&lt;input type="tel" placeholder="06 12 34 56 78"&gt;&lt;/div&gt;</text:p>
      <text:p text:style-name="Normal"><text:s text:c="8"/>&lt;/div&gt;</text:p>
      <text:p text:style-name="Normal"><text:s text:c="6"/>&lt;/div&gt;</text:p>
      <text:p text:style-name="Normal"><text:s text:c="6"/>&lt;div class="fsec"&gt;</text:p>
      <text:p text:style-name="Normal"><text:s text:c="8"/>&lt;h2 class="fst"&gt;&lt;span&gt;02&lt;/span&gt; Adresse de livraison&lt;/h2&gt;</text:p>
      <text:p text:style-name="Normal"><text:s text:c="8"/>&lt;div class="fgrd full"&gt;&lt;div class="fld"&gt;&lt;label&gt;Adresse&lt;/label&gt;&lt;input placeholder="12 rue de la Paix"&gt;&lt;/div&gt;&lt;/div&gt;</text:p>
      <text:p text:style-name="Normal"><text:s text:c="8"/>&lt;div class="fgrd" style="margin-top:1rem;"&gt;</text:p>
      <text:p text:style-name="Normal"><text:s text:c="10"/>&lt;div class="fld"&gt;&lt;label&gt;Code postal&lt;/label&gt;&lt;input placeholder="75001"&gt;&lt;/div&gt;</text:p>
      <text:p text:style-name="Normal"><text:s text:c="10"/>&lt;div class="fld"&gt;&lt;label&gt;Ville&lt;/label&gt;&lt;input placeholder="Paris"&gt;&lt;/div&gt;</text:p>
      <text:soft-page-break/>
      <text:p text:style-name="Normal"><text:s text:c="8"/>&lt;/div&gt;</text:p>
      <text:p text:style-name="Normal"><text:s text:c="6"/>&lt;/div&gt;</text:p>
      <text:p text:style-name="Normal"><text:s text:c="6"/>&lt;div class="fsec"&gt;</text:p>
      <text:p text:style-name="Normal"><text:s text:c="8"/>&lt;h2 class="fst"&gt;&lt;span&gt;03&lt;/span&gt; Moyen de paiement&lt;/h2&gt;</text:p>
      <text:p text:style-name="Normal"><text:s text:c="8"/>&lt;div class="paymeth"&gt;</text:p>
      <text:p text:style-name="Normal"><text:s text:c="10"/>&lt;div class="pmth sel" onclick="selPay(this)"&gt;<text:span text:style-name="T53">💳</text:span><text:s/>Carte&lt;/div&gt;</text:p>
      <text:p text:style-name="Normal"><text:s text:c="10"/>&lt;div class="pmth" onclick="selPay(this)"&gt;<text:span text:style-name="T54">🅿</text:span><text:s/>PayPal&lt;/div&gt;</text:p>
      <text:p text:style-name="Normal"><text:s text:c="10"/>&lt;div class="pmth" onclick="selPay(this)"&gt;3× sans frais&lt;/div&gt;</text:p>
      <text:p text:style-name="Normal"><text:s text:c="8"/>&lt;/div&gt;</text:p>
      <text:p text:style-name="Normal"><text:s text:c="8"/>&lt;div class="fgrd full"&gt;&lt;div class="fld"&gt;&lt;label&gt;Numéro de carte&lt;/label&gt;&lt;input placeholder="1234 5678 9012 3456"&gt;&lt;/div&gt;&lt;/div&gt;</text:p>
      <text:p text:style-name="Normal"><text:s text:c="8"/>&lt;div class="fgrd" style="margin-top:1rem;"&gt;</text:p>
      <text:p text:style-name="Normal"><text:s text:c="10"/>&lt;div class="fld"&gt;&lt;label&gt;Expiration&lt;/label&gt;&lt;input placeholder="MM / AA"&gt;&lt;/div&gt;</text:p>
      <text:p text:style-name="Normal"><text:s text:c="10"/>&lt;div class="fld"&gt;&lt;label&gt;CVV&lt;/label&gt;&lt;input placeholder="123"&gt;&lt;/div&gt;</text:p>
      <text:p text:style-name="Normal"><text:s text:c="8"/>&lt;/div&gt;</text:p>
      <text:p text:style-name="Normal"><text:s text:c="8"/>&lt;button class="btn-place" onclick="goTo('confirm');toast('<text:span text:style-name="T55">🎉</text:span><text:s/>Commande confirmée !')"&gt;Confirmer ma commande →&lt;/button&gt;</text:p>
      <text:p text:style-name="Normal"><text:s text:c="8"/>&lt;p style="text-align:center;font-size:.73rem;color:rgba(245,243,239,.22);margin-top:1rem;"&gt;<text:span text:style-name="T56">🔒</text:span><text:s/>Données chiffrées SSL 256-bit — jamais stockées&lt;/p&gt;</text:p>
      <text:p text:style-name="Normal"><text:s text:c="6"/>&lt;/div&gt;</text:p>
      <text:p text:style-name="Normal"><text:s text:c="4"/>&lt;/div&gt;</text:p>
      <text:p text:style-name="Normal"><text:s text:c="4"/>&lt;div&gt;</text:p>
      <text:p text:style-name="Normal"><text:s text:c="6"/>&lt;div class="csumm" style="position:sticky;top:120px;"&gt;</text:p>
      <text:p text:style-name="Normal"><text:s text:c="8"/>&lt;h2 class="smt"&gt;Votre commande&lt;/h2&gt;</text:p>
      <text:p text:style-name="Normal"><text:s text:c="8"/>&lt;div id="chk-items"&gt;&lt;/div&gt;</text:p>
      <text:p text:style-name="Normal"><text:s text:c="8"/>&lt;div class="smr" style="margin-top:1.5rem;"&gt;&lt;span class="sml"&gt;Livraison&lt;/span&gt;&lt;span style="color:var(--cyan)"&gt;Gratuite&lt;/span&gt;&lt;/div&gt;</text:p>
      <text:p text:style-name="Normal"><text:s text:c="8"/>&lt;div class="smtot"&gt;&lt;span class="smtlbl"&gt;Total&lt;/span&gt;&lt;span class="smtprc" id="chk-tot"&gt;0,00 €&lt;/span&gt;&lt;/div&gt;</text:p>
      <text:soft-page-break/>
      <text:p text:style-name="Normal"><text:s text:c="8"/>&lt;div class="trust"&gt;</text:p>
      <text:p text:style-name="Normal"><text:s text:c="10"/>&lt;div class="ti"&gt;&lt;span style="color:var(--cyan)"&gt;<text:span text:style-name="T57">🔒</text:span>&lt;/span&gt;SSL 256-bit&lt;/div&gt;</text:p>
      <text:p text:style-name="Normal"><text:s text:c="10"/>&lt;div class="ti"&gt;&lt;span style="color:var(--cyan)"&gt;<text:span text:style-name="T58">🚚</text:span>&lt;/span&gt;Livraison est. 4–9 juillet&lt;/div&gt;</text:p>
      <text:p text:style-name="Normal"><text:s text:c="8"/>&lt;/div&gt;</text:p>
      <text:p text:style-name="Normal"><text:s text:c="6"/>&lt;/div&gt;</text:p>
      <text:p text:style-name="Normal"><text:s text:c="4"/>&lt;/div&gt;</text:p>
      <text:p text:style-name="Normal"><text:s text:c="2"/>&lt;/div&gt;</text:p>
      <text:p text:style-name="Normal">&lt;/div&gt;</text:p>
      <text:p text:style-name="Normal"/>
      <text:p text:style-name="Normal">&lt;!--<text:s/><text:span text:style-name="T59">██</text:span><text:s/>CONFIRMATION<text:s/><text:span text:style-name="T60">██</text:span><text:s/>--&gt;</text:p>
      <text:p text:style-name="Normal">&lt;div class="page" id="page-confirm"&gt;</text:p>
      <text:p text:style-name="Normal"><text:s text:c="2"/>&lt;div class="confpage"&gt;</text:p>
      <text:p text:style-name="Normal"><text:s text:c="4"/>&lt;div class="conficon"&gt;<text:span text:style-name="T61">✅</text:span>&lt;/div&gt;</text:p>
      <text:p text:style-name="Normal"><text:s text:c="4"/>&lt;h1 class="ctit"&gt;Merci pour votre commande !&lt;/h1&gt;</text:p>
      <text:p text:style-name="Normal"><text:s text:c="4"/>&lt;p class="csub"&gt;Votre commande est confirmée. Vous recevrez un email de confirmation avec le numéro de suivi.&lt;/p&gt;</text:p>
      <text:p text:style-name="Normal"><text:s text:c="4"/>&lt;div class="ordnum"&gt;N° AER-&lt;span id="ordnum"&gt;29471&lt;/span&gt;&lt;/div&gt;</text:p>
      <text:p text:style-name="Normal"><text:s text:c="4"/>&lt;div class="ctrack"&gt;</text:p>
      <text:p text:style-name="Normal"><text:s text:c="6"/>&lt;div class="trstep"&gt;&lt;div class="trdot done"&gt;✓&lt;/div&gt;&lt;div class="trnm"&gt;Confirmée&lt;/div&gt;&lt;/div&gt;</text:p>
      <text:p text:style-name="Normal"><text:s text:c="6"/>&lt;div class="trstep"&gt;&lt;div class="trdot pend"&gt;<text:span text:style-name="T62">📦</text:span>&lt;/div&gt;&lt;div class="trnm"&gt;Préparation&lt;/div&gt;&lt;/div&gt;</text:p>
      <text:p text:style-name="Normal"><text:s text:c="6"/>&lt;div class="trstep"&gt;&lt;div class="trdot pend"&gt;<text:span text:style-name="T63">🚚</text:span>&lt;/div&gt;&lt;div class="trnm"&gt;En livraison&lt;/div&gt;&lt;/div&gt;</text:p>
      <text:p text:style-name="Normal"><text:s text:c="6"/>&lt;div class="trstep"&gt;&lt;div class="trdot pend"&gt;<text:span text:style-name="T64">🏠</text:span>&lt;/div&gt;&lt;div class="trnm"&gt;Livré&lt;/div&gt;&lt;/div&gt;</text:p>
      <text:p text:style-name="Normal"><text:s text:c="4"/>&lt;/div&gt;</text:p>
      <text:p text:style-name="Normal"><text:s text:c="4"/>&lt;button class="btn-main" onclick="cart=[];updUI();goTo('home')" style="margin-top:2rem;"&gt;Retour à l'accueil&lt;/button&gt;</text:p>
      <text:soft-page-break/>
      <text:p text:style-name="Normal"><text:s text:c="2"/>&lt;/div&gt;</text:p>
      <text:p text:style-name="Normal">&lt;/div&gt;</text:p>
      <text:p text:style-name="Normal"/>
      <text:p text:style-name="Normal">&lt;script&gt;</text:p>
      <text:p text:style-name="Normal">// CURSOR</text:p>
      <text:p text:style-name="Normal">const cur=document.getElementById('cursor'),ctr=document.getElementById('ctrail');</text:p>
      <text:p text:style-name="Normal">let mx=400,my=400,tx=400,ty=400;</text:p>
      <text:p text:style-name="Normal">document.addEventListener('mousemove',e=&gt;{mx=e.clientX;my=e.clientY;cur.style.left=mx+'px';cur.style.top=my+'px';});</text:p>
      <text:p text:style-name="Normal">(function anim(){tx+=(mx-tx)*.1;ty+=(my-ty)*.1;ctr.style.left=tx+'px';ctr.style.top=ty+'px';requestAnimationFrame(anim);})();</text:p>
      <text:p text:style-name="Normal">document.querySelectorAll('button,a').forEach(el=&gt;{</text:p>
      <text:p text:style-name="Normal"><text:s text:c="2"/>el.addEventListener('mouseenter',()=&gt;{cur.style.transform='translate(-50%,-50%) scale(2.5)';cur.style.background='rgba(79,200,212,.4)';});</text:p>
      <text:p text:style-name="Normal"><text:s text:c="2"/>el.addEventListener('mouseleave',()=&gt;{cur.style.transform='translate(-50%,-50%) scale(1)';cur.style.background='var(--cyan)';});</text:p>
      <text:p text:style-name="Normal">});</text:p>
      <text:p text:style-name="Normal"/>
      <text:p text:style-name="Normal">// ROUTER</text:p>
      <text:p text:style-name="Normal">function goTo(p){</text:p>
      <text:p text:style-name="Normal"><text:s text:c="2"/>document.querySelectorAll('.page').forEach(x=&gt;x.classList.remove('active'));</text:p>
      <text:p text:style-name="Normal"><text:s text:c="2"/>document.getElementById('page-'+p).classList.add('active');</text:p>
      <text:p text:style-name="Normal"><text:s text:c="2"/>window.scrollTo({top:0,behavior:'smooth'});</text:p>
      <text:p text:style-name="Normal"><text:s text:c="2"/>if(p==='cart')renderCart();</text:p>
      <text:p text:style-name="Normal"><text:s text:c="2"/>if(p==='checkout')renderCheckout();</text:p>
      <text:p text:style-name="Normal"><text:s text:c="2"/>if(p==='confirm')document.getElementById('ordnum').textContent=Math.floor(10000+Math.random()*89999);</text:p>
      <text:p text:style-name="Normal"><text:s text:c="2"/>if(p==='product1'){initPV('pv1','79,200,212');}</text:p>
      <text:p text:style-name="Normal"><text:s text:c="2"/>if(p==='product2'){initPV('pv2','155,127,255');}</text:p>
      <text:soft-page-break/>
      <text:p text:style-name="Normal"><text:s text:c="2"/>setTimeout(()=&gt;document.querySelectorAll('.reveal').forEach(r=&gt;r.classList.add('visible')),100);</text:p>
      <text:p text:style-name="Normal">}</text:p>
      <text:p text:style-name="Normal"/>
      <text:p text:style-name="Normal">// CART</text:p>
      <text:p text:style-name="Normal">let cart=[];</text:p>
      <text:p text:style-name="Normal">function addToCart(name,price,icon){</text:p>
      <text:p text:style-name="Normal"><text:s text:c="2"/>const ex=cart.find(i=&gt;i.name===name);</text:p>
      <text:p text:style-name="Normal"><text:s text:c="2"/>if(ex)ex.qty++; else cart.push({name,price,icon,qty:1});</text:p>
      <text:p text:style-name="Normal"><text:s text:c="2"/>updUI();</text:p>
      <text:p text:style-name="Normal">}</text:p>
      <text:p text:style-name="Normal">function updUI(){document.getElementById('cc').textContent=cart.reduce((s,i)=&gt;s+i.qty,0);}</text:p>
      <text:p text:style-name="Normal">function renderCart(){</text:p>
      <text:p text:style-name="Normal"><text:s text:c="2"/>const c=document.getElementById('cart-container');</text:p>
      <text:p text:style-name="Normal"><text:s text:c="2"/>if(!cart.length){</text:p>
      <text:p text:style-name="Normal"><text:s text:c="4"/>c.innerHTML=`&lt;div class="cempty"&gt;&lt;div class="ceico"&gt;<text:span text:style-name="T65">🛒</text:span>&lt;/div&gt;&lt;p style="color:rgba(245,243,239,.4);margin-bottom:2rem;"&gt;Votre panier est vide.&lt;/p&gt;&lt;button class="btn-main" onclick="goTo('home')"&gt;Voir les produits&lt;/button&gt;&lt;/div&gt;`;</text:p>
      <text:p text:style-name="Normal"><text:s text:c="4"/>document.getElementById('sub-tot').textContent='0,00 €';</text:p>
      <text:p text:style-name="Normal"><text:s text:c="4"/>document.getElementById('tot-price').textContent='0,00 €';</text:p>
      <text:p text:style-name="Normal"><text:s text:c="4"/>return;</text:p>
      <text:p text:style-name="Normal"><text:s text:c="2"/>}</text:p>
      <text:p text:style-name="Normal"><text:s text:c="2"/>const tot=cart.reduce((s,i)=&gt;s+i.price*i.qty,0);</text:p>
      <text:p text:style-name="Normal"><text:s text:c="2"/>c.innerHTML=`&lt;div class="citems"&gt;`+cart.map((it,i)=&gt;`</text:p>
      <text:p text:style-name="Normal"><text:s text:c="4"/>&lt;div class="citem"&gt;</text:p>
      <text:p text:style-name="Normal"><text:s text:c="6"/>&lt;div class="cimg"&gt;${it.icon}&lt;/div&gt;</text:p>
      <text:p text:style-name="Normal"><text:s text:c="6"/>&lt;div&gt;</text:p>
      <text:soft-page-break/>
      <text:p text:style-name="Normal"><text:s text:c="8"/>&lt;div class="cin"&gt;${it.name}&lt;/div&gt;</text:p>
      <text:p text:style-name="Normal"><text:s text:c="8"/>&lt;div class="cis"&gt;Livraison gratuite · Garantie 12 mois&lt;/div&gt;</text:p>
      <text:p text:style-name="Normal"><text:s text:c="8"/>&lt;div class="cqrow"&gt;</text:p>
      <text:p text:style-name="Normal"><text:s text:c="10"/>&lt;button class="cqb" onclick="cqty(${i},-1)"&gt;−&lt;/button&gt;</text:p>
      <text:p text:style-name="Normal"><text:s text:c="10"/>&lt;span class="cqn"&gt;${it.qty}&lt;/span&gt;</text:p>
      <text:p text:style-name="Normal"><text:s text:c="10"/>&lt;button class="cqb" onclick="cqty(${i},1)"&gt;+&lt;/button&gt;</text:p>
      <text:p text:style-name="Normal"><text:s text:c="8"/>&lt;/div&gt;</text:p>
      <text:p text:style-name="Normal"><text:s text:c="6"/>&lt;/div&gt;</text:p>
      <text:p text:style-name="Normal"><text:s text:c="6"/>&lt;div&gt;</text:p>
      <text:p text:style-name="Normal"><text:s text:c="8"/>&lt;div class="cip"&gt;${(it.price*it.qty).toFixed(2)} €&lt;/div&gt;</text:p>
      <text:p text:style-name="Normal"><text:s text:c="8"/>&lt;span class="crm" onclick="crm(${i})"&gt;Supprimer&lt;/span&gt;</text:p>
      <text:p text:style-name="Normal"><text:s text:c="6"/>&lt;/div&gt;</text:p>
      <text:p text:style-name="Normal"><text:s text:c="4"/>&lt;/div&gt;`).join('')+`&lt;/div&gt;`;</text:p>
      <text:p text:style-name="Normal"><text:s text:c="2"/>document.getElementById('sub-tot').textContent=tot.toFixed(2)+' €';</text:p>
      <text:p text:style-name="Normal"><text:s text:c="2"/>document.getElementById('tot-price').textContent=tot.toFixed(2)+' €';</text:p>
      <text:p text:style-name="Normal">}</text:p>
      <text:p text:style-name="Normal">function cqty(i,d){cart[i].qty+=d;if(cart[i].qty&lt;=0)cart.splice(i,1);updUI();renderCart();}</text:p>
      <text:p text:style-name="Normal">function crm(i){cart.splice(i,1);updUI();renderCart();}</text:p>
      <text:p text:style-name="Normal">function renderCheckout(){</text:p>
      <text:p text:style-name="Normal"><text:s text:c="2"/>const tot=cart.reduce((s,i)=&gt;s+i.price*i.qty,0);</text:p>
      <text:p text:style-name="Normal"><text:s text:c="2"/>document.getElementById('chk-items').innerHTML=cart.map(it=&gt;`</text:p>
      <text:p text:style-name="Normal"><text:s text:c="4"/>&lt;div class="mini-itm"&gt;</text:p>
      <text:p text:style-name="Normal"><text:s text:c="6"/>&lt;div class="mimg"&gt;${it.icon}&lt;/div&gt;</text:p>
      <text:p text:style-name="Normal"><text:s text:c="6"/>&lt;div class="mnm"&gt;${it.name}&lt;br&gt;&lt;span style="color:rgba(245,243,239,.32);font-size:.73rem;"&gt;Qté ${it.qty}&lt;/span&gt;&lt;/div&gt;</text:p>
      <text:p text:style-name="Normal"><text:s text:c="6"/>&lt;div class="mpr"&gt;${(it.price*it.qty).toFixed(2)} €&lt;/div&gt;</text:p>
      <text:p text:style-name="Normal"><text:s text:c="4"/>&lt;/div&gt;`).join('');</text:p>
      <text:p text:style-name="Normal"><text:s text:c="2"/>document.getElementById('chk-tot').textContent=tot.toFixed(2)+' €';</text:p>
      <text:soft-page-break/>
      <text:p text:style-name="Normal">}</text:p>
      <text:p text:style-name="Normal"/>
      <text:p text:style-name="Normal">// MISC</text:p>
      <text:p text:style-name="Normal">function chgQty(d,id){const e=document.getElementById(id);let v=parseInt(e.textContent)+d;v=Math.max(1,Math.min(10,v));e.textContent=v;}</text:p>
      <text:p text:style-name="Normal">function selPay(el){document.querySelectorAll('.pmth').forEach(m=&gt;m.classList.remove('sel'));el.classList.add('sel');}</text:p>
      <text:p text:style-name="Normal">function toast(msg){const n=document.getElementById('notif');document.getElementById('ntext').textContent=msg;n.classList.add('show');setTimeout(()=&gt;n.classList.remove('show'),2800);}</text:p>
      <text:p text:style-name="Normal"/>
      <text:p text:style-name="Normal">// HERO CANVAS</text:p>
      <text:p text:style-name="Normal">const hcv=document.getElementById('hcv'),hctx=hcv.getContext('2d');</text:p>
      <text:p text:style-name="Normal">let hW,hH,pts=[];</text:p>
      <text:p text:style-name="Normal">function initHero(){</text:p>
      <text:p text:style-name="Normal"><text:s text:c="2"/>hW=hcv.width=hcv.offsetWidth;hH=hcv.height=hcv.offsetHeight;pts=[];</text:p>
      <text:p text:style-name="Normal"><text:s text:c="2"/>const n=Math.floor(hW*hH/7500);</text:p>
      <text:p text:style-name="Normal"><text:s text:c="2"/>for(let i=0;i&lt;n;i++)pts.push({x:Math.random()*hW,y:Math.random()*hH,r:Math.random()*1.4+.3,vx:(Math.random()-.5)*.35,vy:(Math.random()-.5)*.35-.05,a:Math.random()*.42+.08,c:Math.random()&lt;.6?'79,200,212':Math.random()&lt;.5?'155,127,255':'245,243,239'});</text:p>
      <text:p text:style-name="Normal">}</text:p>
      <text:p text:style-name="Normal">initHero();window.addEventListener('resize',initHero);</text:p>
      <text:p text:style-name="Normal">let hmx=500,hmy=300;</text:p>
      <text:p text:style-name="Normal">document.addEventListener('mousemove',e=&gt;{const r=hcv.getBoundingClientRect();hmx=e.clientX-r.left;hmy=e.clientY-r.top;});</text:p>
      <text:p text:style-name="Normal">(function dh(){</text:p>
      <text:p text:style-name="Normal"><text:s text:c="2"/>hctx.clearRect(0,0,hW,hH);</text:p>
      <text:soft-page-break/>
      <text:p text:style-name="Normal"><text:s text:c="2"/>const g=hctx.createRadialGradient(hmx,hmy,0,hmx,hmy,420);g.addColorStop(0,'rgba(79,200,212,.07)');g.addColorStop(1,'transparent');hctx.fillStyle=g;hctx.fillRect(0,0,hW,hH);</text:p>
      <text:p text:style-name="Normal"><text:s text:c="2"/>pts.forEach((p,i)=&gt;{</text:p>
      <text:p text:style-name="Normal"><text:s text:c="4"/>const dx=hmx-p.x,dy=hmy-p.y,d=Math.sqrt(dx*dx+dy*dy);</text:p>
      <text:p text:style-name="Normal"><text:s text:c="4"/>if(d&lt;230){p.vx+=dx/d*.012;p.vy+=dy/d*.012;}p.vx*=.98;p.vy*=.98;p.x+=p.vx;p.y+=p.vy;</text:p>
      <text:p text:style-name="Normal"><text:s text:c="4"/>if(p.x&lt;0)p.x=hW;if(p.x&gt;hW)p.x=0;if(p.y&lt;0)p.y=hH;if(p.y&gt;hH)p.y=0;</text:p>
      <text:p text:style-name="Normal"><text:s text:c="4"/>pts.slice(i+1).forEach(q=&gt;{const dx2=p.x-q.x,dy2=p.y-q.y,d2=Math.sqrt(dx2*dx2+dy2*dy2);if(d2&lt;85){hctx.beginPath();hctx.strokeStyle=`rgba(${p.c},${(1-d2/85)*.12})`;hctx.lineWidth=.5;hctx.moveTo(p.x,p.y);hctx.lineTo(q.x,q.y);hctx.stroke();}});</text:p>
      <text:p text:style-name="Normal"><text:s text:c="4"/>hctx.beginPath();hctx.arc(p.x,p.y,p.r,0,Math.PI*2);hctx.fillStyle=`rgba(${p.c},${p.a})`;hctx.fill();</text:p>
      <text:p text:style-name="Normal"><text:s text:c="2"/>});</text:p>
      <text:p text:style-name="Normal"><text:s text:c="2"/>requestAnimationFrame(dh);</text:p>
      <text:p text:style-name="Normal">})();</text:p>
      <text:p text:style-name="Normal"/>
      <text:p text:style-name="Normal">// MINI CARD CANVAS</text:p>
      <text:p text:style-name="Normal">document.querySelectorAll('.mcanv').forEach(c=&gt;{</text:p>
      <text:p text:style-name="Normal"><text:s text:c="2"/>const ctx=c.getContext('2d'),col=c.dataset.color;let cW,cH,mp=[];</text:p>
      <text:p text:style-name="Normal"><text:s text:c="2"/>function init(){cW=c.width=c.offsetWidth;cH=c.height=c.offsetHeight;mp=Array.from({length:12},()=&gt;({x:Math.random()*cW,y:Math.random()*cH,r:Math.random()*50+18,vx:(Math.random()-.5)*.4,vy:(Math.random()-.5)*.4,a:Math.random()*.07+.01}));}</text:p>
      <text:p text:style-name="Normal"><text:s text:c="2"/>init();</text:p>
      <text:p text:style-name="Normal"><text:s text:c="2"/>(function draw(){ctx.clearRect(0,0,cW,cH);mp.forEach(p=&gt;{p.x+=p.vx;p.y+=p.vy;if(p.x&lt;-p.r)p.x=cW+p.r;if(p.x&gt;cW+p.r)p.x=-p.r;if(p.y&lt;-p.r)p.y=cH+p.r;if(p.y&gt;cH+p.r)p.y=-p.r;const g=ctx.createRadialGradient(p.x,p.y,0,p.x,p.y,p.r);g.addColorStop(0,`rgba(${col},${p.a*4})`);g.addColorStop(1,`rgba(${col},0)`);ctx.fillStyle=g;ctx.beginPath();ctx.arc(p.x,p.y,p.r,0,Math.PI*2);ctx.fill();});requestAnimationFrame(draw);})();</text:p>
      <text:p text:style-name="Normal">});</text:p>
      <text:p text:style-name="Normal"/>
      <text:p text:style-name="Normal">// PRODUCT DETAIL CANVAS</text:p>
      <text:p text:style-name="Normal">function initPV(id,col){</text:p>
      <text:p text:style-name="Normal"><text:s text:c="2"/>const c=document.getElementById(id);if(!c||c._i)return;c._i=true;</text:p>
      <text:p text:style-name="Normal"><text:s text:c="2"/>const ctx=c.getContext('2d');let W,H,rings;</text:p>
      <text:p text:style-name="Normal"><text:s text:c="2"/>function init(){W=c.width=c.offsetWidth;H=c.height=c.offsetHeight;rings=Array.from({length:6},(_,i)=&gt;({r:60+i*32,ang:(i*Math.PI*2)/6,spd:.003+i*.0008}));}</text:p>
      <text:p text:style-name="Normal"><text:s text:c="2"/>init();</text:p>
      <text:p text:style-name="Normal"><text:s text:c="2"/>(function draw(){ctx.clearRect(0,0,W,H);const cx=W/2,cy=H/2;rings.forEach((rg,i)=&gt;{rg.ang+=rg.spd;ctx.beginPath();ctx.arc(cx,cy,rg.r,0,Math.PI*2);ctx.strokeStyle=`rgba(${col},${.12-i*.015})`;ctx.lineWidth=1;ctx.stroke();const dx=cx+Math.cos(rg.ang)*rg.r,dy=cy+Math.sin(rg.ang)*rg.r;const g=ctx.createRadialGradient(dx,dy,0,dx,dy,18);g.addColorStop(0,`rgba(${col},.35)`);g.addColorStop(1,`rgba(${col},0)`);ctx.fillStyle=g;ctx.beginPath();ctx.arc(dx,dy,18,0,Math.PI*2);ctx.fill();ctx.beginPath();ctx.arc(dx,dy,3.5,0,Math.PI*2);ctx.fillStyle=`rgba(${col},.85)`;ctx.fill();});requestAnimationFrame(draw);})();</text:p>
      <text:p text:style-name="Normal">}</text:p>
      <text:p text:style-name="Normal"/>
      <text:p text:style-name="Normal">// SCROLL PARALLAX</text:p>
      <text:p text:style-name="Normal">window.addEventListener('scroll',()=&gt;{</text:p>
      <text:p text:style-name="Normal"><text:s text:c="2"/>const s=window.scrollY,hl=document.querySelector('.hero-left');</text:p>
      <text:p text:style-name="Normal"><text:s text:c="2"/>if(hl&amp;&amp;s&lt;window.innerHeight){hl.style.transform=`translateY(${s*.25}px)`;hl.style.opacity=1-s/500;}</text:p>
      <text:p text:style-name="Normal">});</text:p>
      <text:p text:style-name="Normal"/>
      <text:p text:style-name="Normal">// REVEALS</text:p>
      <text:p text:style-name="Normal">const obs=new IntersectionObserver(es=&gt;es.forEach(e=&gt;{if(e.isIntersecting)e.target.classList.add('visible');}),{threshold:.1});</text:p>
      <text:soft-page-break/>
      <text:p text:style-name="Normal">document.querySelectorAll('.reveal').forEach(r=&gt;obs.observe(r));</text:p>
      <text:p text:style-name="Normal">&lt;/script&gt;</text:p>
      <text:p text:style-name="Normal">&lt;/body&gt;</text:p>
      <text:p text:style-name="Normal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thanase saroufim</meta:initial-creator>
    <dc:creator>athanase saroufim</dc:creator>
    <meta:creation-date>2026-06-29T11:25:00Z</meta:creation-date>
    <dc:date>2026-06-29T11:26:00Z</dc:date>
    <meta:template xlink:href="Normal" xlink:type="simple"/>
    <meta:editing-cycles>1</meta:editing-cycles>
    <meta:editing-duration>PT60S</meta:editing-duration>
    <meta:document-statistic meta:page-count="32" meta:paragraph-count="93" meta:word-count="7222" meta:character-count="46850" meta:row-count="331" meta:non-whitespace-character-count="39721"/>
  </office:meta>
</office:document-meta>
</file>